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roman"/>
    <style:font-face style:name="Noto Sans CJK SC" svg:font-family="'Noto Sans CJK SC'" style:font-family-generic="swiss"/>
    <style:font-face style:name="Noto Serif Bengali" svg:font-family="'Noto Serif Bengali'" style:font-family-generic="roman"/>
    <style:font-face style:name="Noto Serif CJK SC" svg:font-family="'Noto Serif CJK SC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mm" fo:margin-bottom="2.12mm" style:contextual-spacing="false" fo:padding-left="0mm" fo:padding-right="0mm" fo:padding-top="0mm" fo:padding-bottom="0.35mm" fo:border-left="none" fo:border-right="none" fo:border-top="none" fo:border-bottom="0.74pt solid #000000"/>
    </style:style>
    <style:style style:name="P2" style:family="paragraph" style:parent-style-name="Heading_20_2">
      <style:paragraph-properties fo:margin-top="0mm" fo:margin-bottom="3.53mm" style:contextual-spacing="false" fo:text-align="left" style:justify-single-word="false"/>
    </style:style>
    <style:style style:name="P3" style:family="paragraph" style:parent-style-name="Standard">
      <style:paragraph-properties fo:margin-top="0mm" fo:margin-bottom="2.12mm" style:contextual-spacing="false" fo:text-align="left" style:justify-single-word="false"/>
    </style:style>
    <style:style style:name="P4" style:family="paragraph" style:parent-style-name="Standard">
      <style:paragraph-properties fo:margin-top="0mm" fo:margin-bottom="3.53mm" style:contextual-spacing="false"/>
    </style:style>
    <style:style style:name="P5" style:family="paragraph" style:parent-style-name="Heading_20_1">
      <style:paragraph-properties fo:margin-top="0mm" fo:margin-bottom="3.53mm" style:contextual-spacing="false" fo:text-align="center" style:justify-single-word="false"/>
    </style:style>
    <style:style style:name="P6" style:family="paragraph" style:parent-style-name="List_20_Paragraph" style:list-style-name="WWNum2">
      <style:paragraph-properties fo:margin-top="0mm" fo:margin-bottom="1.76mm" style:contextual-spacing="false" fo:text-align="left" style:justify-single-word="false"/>
    </style:style>
    <style:style style:name="P7" style:family="paragraph" style:parent-style-name="Standard">
      <style:paragraph-properties fo:margin-left="5.29mm" fo:margin-top="0mm" fo:margin-bottom="2.12mm" style:contextual-spacing="false" fo:text-align="left" style:justify-single-word="false" fo:padding-left="70.56mm" fo:padding-right="0mm" fo:padding-top="0mm" fo:padding-bottom="0mm" fo:border-left="1.5pt solid #bfbfbf" fo:border-right="none" fo:border-top="none" fo:border-bottom="none"/>
    </style:style>
    <style:style style:name="P8" style:family="paragraph" style:parent-style-name="Standard">
      <style:paragraph-properties fo:margin-top="0mm" fo:margin-bottom="2.12mm" style:contextual-spacing="false" fo:text-align="left" style:justify-single-word="false"/>
      <style:text-properties fo:font-style="italic" style:font-style-asian="italic" style:font-style-complex="italic"/>
    </style:style>
    <style:style style:name="P9" style:family="paragraph" style:parent-style-name="Heading_20_3">
      <style:paragraph-properties fo:margin-top="0mm" fo:margin-bottom="3.53mm" style:contextual-spacing="false" fo:text-align="left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liases:<text:line-break/> <text:s/>- article</text:p>
      <text:p text:style-name="P3">#Beginner #Intermediate</text:p>
      <text:p text:style-name="P4"><text:s/></text:p>
      <text:p text:style-name="P5">পদাশ্রিত নি‍র্দেশক (Articles)</text:p>
      <text:p text:style-name="P2">Definite Article (Singular &amp; Plural)</text:p>
      <text:list text:style-name="WWNum2">
        <text:list-item text:start-value="1">
          <text:p text:style-name="P6">বইটি আমার। {boiṭi amar} [The book is mine] (<text:span text:style-name="T1">1 count</text:span>)</text:p>
        </text:list-item>
        <text:list-item>
          <text:p text:style-name="P6">বইগুলো আমার। {boigulo amar} [The books are mine] (<text:span text:style-name="T1">more than 1, but the number is unknown</text:span>)</text:p>
        </text:list-item>
        <text:list-item>
          <text:p text:style-name="P6">ঐ কলমটি তোমার। {oi kölomṭi tomar.} [That pen is yours.]</text:p>
        </text:list-item>
        <text:list-item>
          <text:p text:style-name="P6"/>
        </text:list-item>
        <text:list-item>
          <text:p text:style-name="P6">ওটা তোমার কলম। {oṭa tomar kölom.} [That is your pen.]</text:p>
        </text:list-item>
      </text:list>
      <text:p text:style-name="P4"><text:s/></text:p>
      <text:p text:style-name="P7">[!NOTE]<text:line-break/>টি {ṭi} is interchangable with টা, খানা, খানি {ṭa, khana, khani}<text:line-break/>গুলো {gulo} is interchangable with গুলি {guli}</text:p>
      <text:p text:style-name="P4"><text:s/></text:p>
      <text:p text:style-name="P4"><text:s/></text:p>
      <text:p text:style-name="P2">As [[Counter]] or Unit (indefinite)</text:p>
      <text:p text:style-name="P8">টি {ṭi} is a counter when it's right after a number --</text:p>
      <text:list text:continue-numbering="true" text:style-name="WWNum2">
        <text:list-item>
          <text:p text:style-name="P6">একটি কলম দাও। {ekṭi kölom dao} [Give (me) a pen] (<text:span text:style-name="T1">1 count, but don't know which one. i.e. indefinite</text:span>)</text:p>
        </text:list-item>
        <text:list-item>
          <text:p text:style-name="P6">দশটি বই আছে আমার। {döshṭi boi ache amar} [Ten books, I have] (<text:span text:style-name="T1">more than 1, but don't know which ones. i.e. indefinite</text:span>)</text:p>
        </text:list-item>
      </text:list>
      <text:p text:style-name="P4"><text:s/></text:p>
      <text:p text:style-name="P7">[!NOTE]<text:line-break/>here টি {ṭi} is interchangable with টা, খানা, খানি {ṭa, khana, khani}</text:p>
      <text:p text:style-name="P4"><text:s/></text:p>
      <text:p text:style-name="P9"><text:soft-page-break/>Omitted টি {ṭi}</text:p>
      <text:p text:style-name="P8">For large numbers, it's better to ommit the counter টি {ṭi} --</text:p>
      <text:list text:continue-numbering="true" text:style-name="WWNum2">
        <text:list-item>
          <text:p text:style-name="P6">পাঁচশো কলম লাগবে আমার। {pashsho (pacsho) kölom lagbe amar.} [I need/want 500 pens.]<text:line-break/><text:span text:style-name="T1">Sometimes for stylistic effect --</text:span></text:p>
        </text:list-item>
        <text:list-item>
          <text:p text:style-name="P6">সাত সমুদ্র, তেরো নদী। {shat shomudro, tëro nodi} [The seven seas, and thirteen rivers]</text:p>
        </text:list-item>
        <text:list-item>
          <text:p text:style-name="P6">এক দেশে ছিল এক রাজা। {ëk deshe chilo ëk raja} [(Once) there was a king in a country]</text:p>
        </text:list-item>
      </text:list>
      <text:p text:style-name="P4"><text:s/></text:p>
      <text:p text:style-name="P2">As [[Counter]] and Definite Article Simultaneously</text:p>
      <text:p text:style-name="P8">Reverse the order to make it definite --</text:p>
      <text:list text:continue-numbering="true" text:style-name="WWNum2">
        <text:list-item>
          <text:p text:style-name="P6">হ্যাঁ, বই দুটি আছে। {hë, boi duṭi ache} [Yes, (we) have the 2 books.]</text:p>
        </text:list-item>
        <text:list-item>
          <text:p text:style-name="P6">kölom duṭi lal. [The 2 pens are red.]</text:p>
        </text:list-item>
        <text:list-item>
          <text:p text:style-name="P6">duṭi lal kölom. [2 red pens.]</text:p>
        </text:list-item>
        <text:list-item>
          <text:p text:style-name="P6">duṭi kölom dao. [Give me 2 pens.]</text:p>
        </text:list-item>
        <text:list-item>
          <text:p text:style-name="P6">kölom duṭi dao. [Give me the two pens.]</text:p>
        </text:list-item>
      </text:list>
      <text:p text:style-name="P4"><text:s/></text:p>
      <text:p text:style-name="P8">Sometimes even reversing the order is not necessary. The context makes it obvious. It can be considered stylistic --</text:p>
      <text:list text:continue-numbering="true" text:style-name="WWNum2">
        <text:list-item>
          <text:p text:style-name="P6">সোমবার দুই দেশের রাষ্ট্রপতি বৈঠক করেন। {shombar dui desher rashṭropoti boiṭhok kören} [On Monday, the presidents of the two countries held a meeting.]</text:p>
        </text:list-item>
      </text:list>
      <text:p text:style-name="P4"><text:s/></text:p>
      <text:p text:style-name="P4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roman"/>
    <style:font-face style:name="Noto Sans CJK SC" svg:font-family="'Noto Sans CJK SC'" style:font-family-generic="swiss"/>
    <style:font-face style:name="Noto Serif Bengali" svg:font-family="'Noto Serif Bengali'" style:font-family-generic="roman"/>
    <style:font-face style:name="Noto Serif CJK SC" svg:font-family="'Noto Serif CJK SC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false" style:font-name-asian="Noto Serif CJK SC" style:font-size-asian="12pt" style:language-asian="zh" style:country-asian="CN" style:font-name-complex="Noto Serif Bengali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7mm" style:writing-mode="page"/>
      <style:text-properties style:use-window-font-color="true" loext:opacity="0%" style:font-name="Times New Roman" fo:font-size="12pt" fo:language="en" fo:country="GB" style:letter-kerning="false" style:font-name-asian="Noto Serif CJK SC" style:font-size-asian="12pt" style:language-asian="zh" style:country-asian="CN" style:font-name-complex="Noto Serif Bengali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Cambria" fo:font-family="Cambria" style:font-family-generic="roman" fo:font-size="14pt" style:font-name-asian="Noto Sans CJK SC" style:font-family-asian="'Noto Sans CJK SC'" style:font-family-generic-asian="swiss" style:font-size-asian="14pt" style:font-name-complex="Noto Serif Bengali" style:font-family-complex="'Noto Serif Bengali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Noto Serif CJK SC" style:font-family-asian="'Noto Serif CJK SC'" style:font-family-generic-asian="roman" style:font-size-asian="12pt" style:font-name-complex="Noto Serif Bengali" style:font-family-complex="'Noto Serif Bengali'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mbria" fo:font-family="Cambria" style:font-family-generic="roman" fo:font-size="12pt" fo:font-style="italic" style:font-name-asian="Noto Serif CJK SC" style:font-family-asian="'Noto Serif CJK SC'" style:font-family-generic-asian="roman" style:font-size-asian="12pt" style:font-style-asian="italic" style:font-name-complex="Noto Serif Bengali" style:font-family-complex="'Noto Serif Bengal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name-asian="Noto Serif CJK SC" style:font-family-asian="'Noto Serif CJK SC'" style:font-family-generic-asian="roman" style:font-size-asian="12pt" style:font-name-complex="Noto Serif Bengali" style:font-family-complex="'Noto Serif Bengali'" style:font-family-generic-complex="roman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class="chapter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class="chapter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class="chapter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class="chapter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class="chapter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mm" fo:margin-bottom="0m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4.23m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11.64m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19.05m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26.46m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33.87m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41.28m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48.68m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56.09m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63.5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Un-named</dc:creator>
    <meta:editing-cycles>1</meta:editing-cycles>
    <meta:creation-date>2026-06-21T14:35:08.396000000</meta:creation-date>
    <dc:date>2026-06-21T14:35:08.396000000</dc:date>
    <meta:generator>LibreOffice/26.2.4.2$Linux_X86_64 LibreOffice_project/620$Build-2</meta:generator>
    <meta:document-statistic meta:table-count="0" meta:image-count="0" meta:object-count="0" meta:page-count="2" meta:paragraph-count="39" meta:word-count="329" meta:character-count="1732" meta:non-whitespace-character-count="1435"/>
  </office:meta>
</office:document-meta>
</file>