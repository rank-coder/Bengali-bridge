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59.21mm" style:rel-width="100%" fo:margin-left="0.09mm" fo:margin-top="0mm" fo:margin-bottom="0mm" table:align="left" style:writing-mode="page"/>
    </style:style>
    <style:style style:name="Table1.A" style:family="table-column">
      <style:table-column-properties style:column-width="92.29mm" style:rel-column-width="37990*"/>
    </style:style>
    <style:style style:name="Table1.B" style:family="table-column">
      <style:table-column-properties style:column-width="66.92mm" style:rel-column-width="275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2.12mm" fo:padding-right="2.12mm" fo:padding-top="1.41mm" fo:padding-bottom="1.41mm" fo:border="0.5pt solid #000000"/>
    </style:style>
    <style:style style:name="Table2" style:family="table">
      <style:table-properties style:width="159.21mm" style:rel-width="100%" fo:margin-left="0.09mm" fo:margin-top="0mm" fo:margin-bottom="0mm" table:align="left" style:writing-mode="page"/>
    </style:style>
    <style:style style:name="Table2.A" style:family="table-column">
      <style:table-column-properties style:column-width="99.78mm" style:rel-column-width="41077*"/>
    </style:style>
    <style:style style:name="Table2.B" style:family="table-column">
      <style:table-column-properties style:column-width="59.43mm" style:rel-column-width="24458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2.12mm" fo:padding-right="2.12mm" fo:padding-top="1.41mm" fo:padding-bottom="1.41mm" fo:border="0.5pt solid #000000"/>
    </style:style>
    <style:style style:name="Table3" style:family="table">
      <style:table-properties style:width="159.21mm" style:rel-width="100%" fo:margin-left="0.09mm" fo:margin-top="0mm" fo:margin-bottom="0mm" table:align="left" style:writing-mode="page"/>
    </style:style>
    <style:style style:name="Table3.A" style:family="table-column">
      <style:table-column-properties style:column-width="95.53mm" style:rel-column-width="39321*"/>
    </style:style>
    <style:style style:name="Table3.B" style:family="table-column">
      <style:table-column-properties style:column-width="63.68mm" style:rel-column-width="26214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2.12mm" fo:padding-right="2.12mm" fo:padding-top="1.41mm" fo:padding-bottom="1.41mm" fo:border="0.5pt solid #000000"/>
    </style:style>
    <style:style style:name="P1" style:family="paragraph" style:parent-style-name="Standard">
      <style:paragraph-properties fo:margin-top="0mm" fo:margin-bottom="2.12mm" style:contextual-spacing="false" fo:text-align="left" style:justify-single-word="false"/>
    </style:style>
    <style:style style:name="P2" style:family="paragraph" style:parent-style-name="Standard">
      <style:paragraph-properties fo:margin-top="0mm" fo:margin-bottom="3.53mm" style:contextual-spacing="false"/>
    </style:style>
    <style:style style:name="P3" style:family="paragraph" style:parent-style-name="Standard">
      <style:paragraph-properties fo:margin-top="0mm" fo:margin-bottom="2.12mm" style:contextual-spacing="false" fo:padding-left="0mm" fo:padding-right="0mm" fo:padding-top="0mm" fo:padding-bottom="0.35mm" fo:border-left="none" fo:border-right="none" fo:border-top="none" fo:border-bottom="0.74pt solid #000000"/>
    </style:style>
    <style:style style:name="P4" style:family="paragraph" style:parent-style-name="Heading_20_2">
      <style:paragraph-properties fo:margin-top="0mm" fo:margin-bottom="3.53mm" style:contextual-spacing="false" fo:text-align="left" style:justify-single-word="false"/>
    </style:style>
    <style:style style:name="P5" style:family="paragraph" style:parent-style-name="Heading_20_3">
      <style:paragraph-properties fo:margin-top="0mm" fo:margin-bottom="3.53mm" style:contextual-spacing="false" fo:text-align="left" style:justify-single-word="false"/>
    </style:style>
    <style:style style:name="P6" style:family="paragraph" style:parent-style-name="Standard">
      <style:paragraph-properties fo:margin-left="0.35mm" fo:margin-top="0mm" fo:margin-bottom="1.76mm" style:contextual-spacing="false" fo:text-align="left" style:justify-single-word="false"/>
    </style:style>
    <style:style style:name="P7" style:family="paragraph" style:parent-style-name="Standard">
      <style:paragraph-properties fo:text-align="left" style:justify-single-word="false"/>
    </style:style>
    <style:style style:name="P8" style:family="paragraph" style:parent-style-name="Standard">
      <style:paragraph-properties fo:margin-top="4.23mm" fo:margin-bottom="0mm" style:contextual-spacing="false"/>
    </style:style>
    <style:style style:name="P9" style:family="paragraph" style:parent-style-name="List_20_Paragraph" style:list-style-name="WWNum2">
      <style:paragraph-properties fo:margin-top="0mm" fo:margin-bottom="1.76mm" style:contextual-spacing="false" fo:text-align="lef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Beginner #Intermediate </text:p>
      <text:p text:style-name="P2"><text:s/></text:p>
      <text:p text:style-name="P1">Unlike English, you cannot use the same word for 'or' in <text:span text:style-name="T1">Assertive</text:span> and <text:span text:style-name="T1">Interrogative</text:span> sentences in Bengali.</text:p>
      <text:p text:style-name="P2"><text:s/></text:p>
      <text:p text:style-name="P3"/>
      <text:p text:style-name="P2"><text:s/></text:p>
      <text:p text:style-name="P4">in Affirmative Sentence</text:p>
      <text:p text:style-name="P5">Options:</text:p>
      <text:p text:style-name="P6">1. অথবা öthoba (<text:span text:style-name="T1">safest</text:span> for <text:span text:style-name="T1">affirmative</text:span> sentences)</text:p>
      <text:p text:style-name="P6">2. বা ba</text:p>
      <text:p text:style-name="P6">3. কিংবা kimba</text:p>
      <text:p text:style-name="P6">4. নাহয় na höy (most <text:span text:style-name="T1">colloquial</text:span>)</text:p>
      <text:p text:style-name="P2"><text:s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<text:span text:style-name="T1">বাংলা</text:span></text:p>
            </table:table-cell>
            <table:table-cell table:style-name="Table1.A1" office:value-type="string">
              <text:p text:style-name="P7"><text:span text:style-name="T1">English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7">কাল অথবা পরশু আমি চলে যাবো।&lt;br&gt;kal öthoba porshu ami cole jabo.</text:p>
          </table:table-cell>
          <table:table-cell table:style-name="Table1.A1" office:value-type="string">
            <text:p text:style-name="P7">I'll leave tomorrow or the day after.</text:p>
          </table:table-cell>
        </table:table-row>
        <table:table-row table:style-name="Table1.1">
          <table:table-cell table:style-name="Table1.A1" office:value-type="string">
            <text:p text:style-name="P7">কাল নাহয় পরশু আমি চলে যাবো।&lt;br&gt;kal nahöy porshu ami cole jabo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আমাকে একটা চা অথবা একটা কফি দাও।&lt;br&gt;amake ëkṭa ca öthoba ëkṭa köphi.</text:p>
          </table:table-cell>
          <table:table-cell table:style-name="Table1.A1" office:value-type="string">
            <text:p text:style-name="P7">Give me a tea or a coffee.</text:p>
          </table:table-cell>
        </table:table-row>
        <table:table-row table:style-name="Table1.1">
          <table:table-cell table:style-name="Table1.A1" office:value-type="string">
            <text:p text:style-name="P7">আমাকে একটা চা বা কফি দাও।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বলা বা না বলা সমান।&lt;br&gt;böla ba na böla shoman.</text:p>
          </table:table-cell>
          <table:table-cell table:style-name="Table1.A1" office:value-type="string">
            <text:p text:style-name="P7">To say (i.e. confess) or not say would be the same.</text:p>
          </table:table-cell>
        </table:table-row>
        <table:table-row table:style-name="Table1.1">
          <table:table-cell table:style-name="Table1.A1" office:value-type="string">
            <text:p text:style-name="P7">দিপু কিংবা অপু-কে বলো।&lt;br&gt;dipu kimba opu-ke bölo.</text:p>
          </table:table-cell>
          <table:table-cell table:style-name="Table1.A1" office:value-type="string">
            <text:p text:style-name="P7">Tell Dipu or Opu.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8"><text:s/></text:p>
      <text:p text:style-name="P4"><text:soft-page-break/>in Negative Sentences</text:p>
      <text:p text:style-name="P6">1. Try to avoid <text:span text:style-name="T2">অথবা</text:span> for negative sentences.</text:p>
      <text:p text:style-name="P6">2. <text:span text:style-name="T2">কিংবা</text:span> is safest for most of the negative sentences.</text:p>
      <text:p text:style-name="P2"><text:s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7"><text:span text:style-name="T1">বাংলা</text:span></text:p>
            </table:table-cell>
            <table:table-cell table:style-name="Table2.A1" office:value-type="string">
              <text:p text:style-name="P7"><text:span text:style-name="T1">English</text:span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7">আমি আপেল কিংবা কলা কিনিনি (কিনি নাই)।&lt;br&gt;ami apel kimba köla kini-ni.</text:p>
          </table:table-cell>
          <table:table-cell table:style-name="Table2.A1" office:value-type="string">
            <text:p text:style-name="P7">I didn't by apples or bananas.</text:p>
          </table:table-cell>
        </table:table-row>
        <table:table-row table:style-name="Table2.1">
          <table:table-cell table:style-name="Table2.A1" office:value-type="string">
            <text:p text:style-name="P7">এতে আমাদের চিনি কিংবা লবণ লাগবে না।&lt;br&gt;ete amader cini kimba löbon lagbe na.</text:p>
          </table:table-cell>
          <table:table-cell table:style-name="Table2.A1" office:value-type="string">
            <text:p text:style-name="P7">We don't need sugar or salt for this.</text:p>
          </table:table-cell>
        </table:table-row>
        <table:table-row table:style-name="Table2.1">
          <table:table-cell table:style-name="Table2.A1" office:value-type="string">
            <text:p text:style-name="P7">সে আমায় কল বা মেসেজ করেনি (করে নাই)।&lt;br&gt;she amay köl ba mesej köre-ni.</text:p>
          </table:table-cell>
          <table:table-cell table:style-name="Table2.A1" office:value-type="string">
            <text:p text:style-name="P7">She/He didn't call or message me.</text:p>
          </table:table-cell>
        </table:table-row>
      </table:table>
      <text:p text:style-name="P8"><text:s/></text:p>
      <text:p text:style-name="P4">in Interrogative Sentences</text:p>
      <text:p text:style-name="P6">1. <text:span text:style-name="T1">NEVER</text:span> use <text:span text:style-name="T2">অথবা</text:span> </text:p>
      <text:p text:style-name="P6">2. use <text:span text:style-name="T2">না</text:span> or <text:span text:style-name="T2">নাকি</text:span> instead</text:p>
      <text:p text:style-name="P2"><text:s/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7"><text:span text:style-name="T1">বাংলা</text:span></text:p>
            </table:table-cell>
            <table:table-cell table:style-name="Table3.A1" office:value-type="string">
              <text:p text:style-name="P7"><text:span text:style-name="T1">English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7">এটা কি তোমার বই নাকি ওর?&lt;br&gt;eṭa ki tomar boi naki or?</text:p>
          </table:table-cell>
          <table:table-cell table:style-name="Table3.A1" office:value-type="string">
            <text:p text:style-name="P7">Is this your book or his?</text:p>
          </table:table-cell>
        </table:table-row>
        <table:table-row table:style-name="Table3.1">
          <table:table-cell table:style-name="Table3.A1" office:value-type="string">
            <text:p text:style-name="P7">ওটা কি লাল, নীল, নাকি সবুজ?&lt;br&gt;oṭa ki lal, nil, naki shobuj?</text:p>
          </table:table-cell>
          <table:table-cell table:style-name="Table3.A1" office:value-type="string">
            <text:p text:style-name="P7">Is that red, blue, or green?</text:p>
          </table:table-cell>
        </table:table-row>
        <table:table-row table:style-name="Table3.1">
          <table:table-cell table:style-name="Table3.A1" office:value-type="string">
            <text:p text:style-name="P7">তুমি কি যাবে? নাকি না?&lt;br&gt;tumi ki jabe? naki na?</text:p>
          </table:table-cell>
          <table:table-cell table:style-name="Table3.A1" office:value-type="string">
            <text:p text:style-name="P7">Will you go, or not?</text:p>
          </table:table-cell>
        </table:table-row>
        <table:table-row table:style-name="Table3.1">
          <table:table-cell table:style-name="Table3.A1" office:value-type="string">
            <text:p text:style-name="P7">চা? না কফি?&lt;br&gt;ca? na köphi?</text:p>
          </table:table-cell>
          <table:table-cell table:style-name="Table3.A1" office:value-type="string">
            <text:p text:style-name="P7">Tea or coffee?&lt;br&gt;</text:p>
          </table:table-cell>
        </table:table-row>
        <table:table-row table:style-name="Table3.1">
          <table:table-cell table:style-name="Table3.A1" office:value-type="string">
            <text:p text:style-name="P7">তুমি কি খুশি? নাকি অভিনয়?&lt;br&gt;tumi ki khushi? naki obhinöy?</text:p>
          </table:table-cell>
          <table:table-cell table:style-name="Table3.A1" office:value-type="string">
            <text:p text:style-name="P7">Are you happy, or just pretending?</text:p>
          </table:table-cell>
        </table:table-row>
        <table:table-row table:style-name="Table3.1">
          <table:table-cell table:style-name="Table3.A1" office:value-type="string">
            <text:p text:style-name="P7">তুমি কি যাবে, না যাবে না?&lt;br&gt;tumi ki jabe, na jabe na?</text:p>
          </table:table-cell>
          <table:table-cell table:style-name="Table3.A1" office:value-type="string">
            <text:p text:style-name="P7">Will you go or not?</text:p>
          </table:table-cell>
        </table:table-row>
      </table:table>
      <text:p text:style-name="P8"><text:s/></text:p>
      <text:p text:style-name="P1">Coming up:</text:p>
      <text:list text:style-name="WWNum2">
        <text:list-item text:start-value="1">
          <text:p text:style-name="P9"><text:soft-page-break/>[[Uses of 'either ... or', 'neither ... nor']]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page"/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roman" fo:font-size="14pt" style:font-name-asian="Noto Sans CJK SC" style:font-family-asian="'Noto Sans CJK SC'" style:font-family-generic-asian="swiss" style:font-size-asian="14pt" style:font-name-complex="Noto Serif Bengali" style:font-family-complex="'Noto Serif Bengali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roman" fo:font-size="12pt" fo:font-style="italic" style:font-name-asian="Noto Serif CJK SC" style:font-family-asian="'Noto Serif CJK SC'" style:font-family-generic-asian="roman" style:font-size-asian="12pt" style:font-style-asian="italic" style:font-name-complex="Noto Serif Bengali" style:font-family-complex="'Noto Serif Bengal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class="chapter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class="chapter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class="chapter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class="chapter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class="chapter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.23m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11.64m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19.05m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26.46m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33.87m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41.28m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8.68m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56.09m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63.5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6-21T14:35:32.943000000</meta:creation-date>
    <dc:date>2026-06-21T14:35:32.943000000</dc:date>
    <meta:generator>LibreOffice/26.2.4.2$Linux_X86_64 LibreOffice_project/620$Build-2</meta:generator>
    <meta:document-statistic meta:table-count="3" meta:image-count="0" meta:object-count="0" meta:page-count="3" meta:paragraph-count="60" meta:word-count="323" meta:character-count="1621" meta:non-whitespace-character-count="1339"/>
  </office:meta>
</office:document-meta>
</file>