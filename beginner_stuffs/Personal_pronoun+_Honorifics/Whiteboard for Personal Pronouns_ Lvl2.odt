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ntium Book Plus" svg:font-family="'Gentium Book Plus'" style:font-family-generic="roman"/>
    <style:font-face style:name="July" svg:font-family="July" style:font-family-generic="roman"/>
    <style:font-face style:name="Liberation Serif" svg:font-family="'Liberation Serif'" style:font-family-generic="roman"/>
    <style:font-face style:name="Microsoft YaHei" svg:font-family="'Microsoft YaHei'" style:font-family-generic="roman"/>
    <style:font-face style:name="Mukti Narrow" svg:font-family="'Mukti Narrow'" style:font-family-generic="roman"/>
    <style:font-face style:name="NSimSun" svg:font-family="NSimSun" style:font-family-generic="roman"/>
    <style:font-face style:name="NSimSun1" svg:font-family="NSimSun" style:font-family-generic="swiss"/>
  </office:font-face-decls>
  <office:automatic-styles>
    <style:style style:name="P1" style:family="paragraph" style:parent-style-name="Heading_20_1">
      <style:paragraph-properties fo:margin-left="0mm" fo:margin-right="0mm" fo:margin-top="0mm" fo:margin-bottom="6.35mm" style:contextual-spacing="false" fo:line-height="130%" fo:text-align="left" style:justify-single-word="false" fo:text-indent="0mm" style:auto-text-indent="false" style:writing-mode="lr-tb"/>
    </style:style>
    <style:style style:name="P2" style:family="paragraph" style:parent-style-name="Heading_20_2">
      <style:paragraph-properties fo:margin-left="0mm" fo:margin-right="0mm" fo:margin-top="7.06mm" fo:margin-bottom="3.88mm" style:contextual-spacing="false" fo:line-height="130%" fo:text-align="left" style:justify-single-word="false" fo:text-indent="0mm" style:auto-text-indent="false" style:writing-mode="lr-tb"/>
    </style:style>
    <style:style style:name="P3" style:family="paragraph" style:parent-style-name="Heading_20_3">
      <style:paragraph-properties fo:margin-left="0mm" fo:margin-right="0mm" fo:margin-top="7.76mm" fo:margin-bottom="3.88mm" style:contextual-spacing="false" fo:line-height="130%" fo:text-align="left" style:justify-single-word="false" fo:text-indent="0mm" style:auto-text-indent="false" style:writing-mode="lr-tb"/>
    </style:style>
    <style:style style:name="P4" style:family="paragraph" style:parent-style-name="Text_20_body">
      <style:paragraph-properties fo:margin-left="0mm" fo:margin-right="0mm" fo:margin-top="0mm" fo:margin-bottom="4.23mm" style:contextual-spacing="false" fo:line-height="165%" fo:text-align="left" style:justify-single-word="false" fo:text-indent="0mm" style:auto-text-indent="false" style:writing-mode="lr-tb"/>
    </style:style>
    <style:style style:name="P5" style:family="paragraph" style:parent-style-name="Standard">
      <style:paragraph-properties fo:text-align="left" style:justify-single-word="false" style:writing-mode="lr-tb"/>
      <style:text-properties style:font-name="Gentium Book Plus"/>
    </style:style>
    <style:style style:name="T1" style:family="text">
      <style:text-properties fo:color="#0f172a" loext:opacity="100%" style:font-name="Gentium Book Plus" fo:font-size="24pt" fo:font-weight="bold" style:font-size-asian="24pt" style:font-weight-asian="bold"/>
    </style:style>
    <style:style style:name="T2" style:family="text">
      <style:text-properties fo:color="#0f172a" loext:opacity="100%" style:font-name="Gentium Book Plus" fo:font-size="18pt" fo:font-weight="bold" style:font-size-asian="18pt" style:font-weight-asian="bold"/>
    </style:style>
    <style:style style:name="T3" style:family="text">
      <style:text-properties fo:color="#0f172a" loext:opacity="100%" style:font-name="Gentium Book Plus" fo:font-size="15pt" fo:font-weight="bold" style:font-size-asian="15pt" style:font-weight-asian="bold"/>
    </style:style>
    <style:style style:name="T4" style:family="text">
      <style:text-properties style:font-name="Gentium Book Plus" fo:font-size="11pt" style:font-size-asian="11pt"/>
    </style:style>
    <style:style style:name="T5" style:family="text">
      <style:text-properties style:font-name="Gentium Book Pl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2nd person</text:span><text:span text:style-name="T1"/></text:h>
      <text:h text:style-name="P2" text:outline-level="2" loext:marker-style-name="T2"><text:span text:style-name="T2">Neutral Honour</text:span><text:span text:style-name="T2"/></text:h>
      <text:h text:style-name="P3" text:outline-level="3" loext:marker-style-name="T3"><text:span text:style-name="T3">Subject Pronoun</text:span><text:span text:style-name="T3"/></text:h>
      <text:p text:style-name="P4" loext:marker-style-name="T4"><text:span text:style-name="T4">tumi [You]<text:line-break/>tumi ke? [Who are you?]<text:line-break/>tumi jao [You go]<text:line-break/>tumi ëkjon shikkhök. [You are a teacher]</text:span><text:span text:style-name="T4"/></text:p>
      <text:h text:style-name="P3" text:outline-level="3" loext:marker-style-name="T3"><text:span text:style-name="T3">Possessives</text:span><text:span text:style-name="T3"/></text:h>
      <text:p text:style-name="P4" loext:marker-style-name="T4"><text:span text:style-name="T4">tomar [Your/Yours]<text:line-break/>tomar boi. [Your book/ Your books.]<text:line-break/>ei böiṭi tomar. [This book is yours.]</text:span><text:span text:style-name="T4"/></text:p>
      <text:h text:style-name="P3" text:outline-level="3" loext:marker-style-name="T3"><text:span text:style-name="T3">Object</text:span><text:span text:style-name="T3"/></text:h>
      <text:p text:style-name="P4" loext:marker-style-name="T4"><text:span text:style-name="T4">tomake [You]<text:line-break/>ami tomake cini. [I know you.]</text:span><text:span text:style-name="T4"/></text:p>
      <text:h text:style-name="P2" text:outline-level="2" loext:marker-style-name="T2"><text:span text:style-name="T2">Low Honour</text:span><text:span text:style-name="T2"/></text:h>
      <text:h text:style-name="P3" text:outline-level="3" loext:marker-style-name="T3"><text:span text:style-name="T3">Subject</text:span><text:span text:style-name="T3"/></text:h>
      <text:p text:style-name="P4" loext:marker-style-name="T4"><text:span text:style-name="T4">tui [You]<text:line-break/>tui ke? [Who are you?]<text:line-break/>tui ja. [You go.]</text:span><text:span text:style-name="T4"/></text:p>
      <text:h text:style-name="P3" text:outline-level="3" loext:marker-style-name="T3"><text:soft-page-break/><text:span text:style-name="T3">Possessives</text:span><text:span text:style-name="T3"/></text:h>
      <text:p text:style-name="P4" loext:marker-style-name="T4"><text:span text:style-name="T4">tor [Your/Yours]<text:line-break/>tor boi [Your book]<text:line-break/>ei boiṭi tor. [This book is yours.]</text:span><text:span text:style-name="T4"/></text:p>
      <text:h text:style-name="P3" text:outline-level="3" loext:marker-style-name="T3"><text:span text:style-name="T3">Object</text:span><text:span text:style-name="T3"/></text:h>
      <text:p text:style-name="P4" loext:marker-style-name="T4"><text:span text:style-name="T4">toke [You]<text:line-break/>ami toke cini. [I know you.]</text:span><text:span text:style-name="T4"/></text:p>
      <text:h text:style-name="P2" text:outline-level="2" loext:marker-style-name="T2"><text:span text:style-name="T2">High Honour</text:span><text:span text:style-name="T2"/></text:h>
      <text:h text:style-name="P3" text:outline-level="3" loext:marker-style-name="T3"><text:span text:style-name="T3">Subject</text:span><text:span text:style-name="T3"/></text:h>
      <text:p text:style-name="P4" loext:marker-style-name="T4"><text:span text:style-name="T4">apni [You]<text:line-break/>apni ke? [Who are you?]<text:line-break/>apni jan. [You go.]</text:span><text:span text:style-name="T4"/></text:p>
      <text:h text:style-name="P3" text:outline-level="3" loext:marker-style-name="T3"><text:span text:style-name="T3">Possessives</text:span><text:span text:style-name="T3"/></text:h>
      <text:p text:style-name="P4" loext:marker-style-name="T4"><text:span text:style-name="T4">apnar [Your]<text:line-break/>apnar boi. [Your book]<text:line-break/>ei boiṭi apnar. [This book is yours]</text:span><text:span text:style-name="T4"/></text:p>
      <text:h text:style-name="P3" text:outline-level="3" loext:marker-style-name="T3"><text:span text:style-name="T3">Object</text:span><text:span text:style-name="T3"/></text:h>
      <text:p text:style-name="P4" loext:marker-style-name="T4"><text:span text:style-name="T4">apnake [You]<text:line-break/>ami apnake cini. [I know/recognize you.]</text:span><text:span text:style-name="T4"/></text:p>
      <text:h text:style-name="P1" text:outline-level="1" loext:marker-style-name="T1"><text:soft-page-break/><text:span text:style-name="T1">3rd Person</text:span><text:span text:style-name="T1"/></text:h>
      <text:h text:style-name="P2" text:outline-level="2" loext:marker-style-name="T2"><text:span text:style-name="T2">Neutral</text:span><text:span text:style-name="T2"/></text:h>
      <text:h text:style-name="P3" text:outline-level="3" loext:marker-style-name="T3"><text:span text:style-name="T3">Subject</text:span><text:span text:style-name="T3"/></text:h>
      <text:p text:style-name="P4" loext:marker-style-name="T4"><text:span text:style-name="T4">she [He/She]<text:line-break/>she ëkjon bhalo manush. [He/She is a good person.]<text:line-break/>she bëbsha köre. [He/She does business.]<text:line-break/>she baṛi jacche. [He/She is going home.]</text:span><text:span text:style-name="T4"/></text:p>
      <text:h text:style-name="P3" text:outline-level="3" loext:marker-style-name="T3"><text:span text:style-name="T3">Possessives</text:span><text:span text:style-name="T3"/></text:h>
      <text:p text:style-name="P4" loext:marker-style-name="T4"><text:span text:style-name="T4">tar [his/her]/[his/hers]<text:line-break/>tar ekṭi gaṛi ache. [He/She has a car.]<text:line-break/>tar boi [His/Her book]<text:line-break/>ei boiṭi tar. [This book is his/hers.]<text:line-break/>ei gaṛiṭi tar. [This car is his/hers.]</text:span><text:span text:style-name="T4"/></text:p>
      <text:h text:style-name="P3" text:outline-level="3" loext:marker-style-name="T3"><text:span text:style-name="T3">Object</text:span><text:span text:style-name="T3"/></text:h>
      <text:p text:style-name="P4" loext:marker-style-name="T4"><text:span text:style-name="T4">take [Him/Her]<text:line-break/>ami take cini. [I know him/her.]<text:line-break/>(tumi) take ḍako. [You call him/her.]</text:span><text:span text:style-name="T4"/></text:p>
      <text:h text:style-name="P2" text:outline-level="2" loext:marker-style-name="T2"><text:soft-page-break/><text:span text:style-name="T2">High Honour</text:span><text:span text:style-name="T2"/></text:h>
      <text:h text:style-name="P3" text:outline-level="3" loext:marker-style-name="T3"><text:span text:style-name="T3">Subject</text:span><text:span text:style-name="T3"/></text:h>
      <text:p text:style-name="P4" loext:marker-style-name="T4"><text:span text:style-name="T4">tini [He/She]<text:line-break/>tini ëkjon shikkhok. [He/She is a teacher.]<text:line-break/>tini bëbsha kören. [He/She does business.]<text:line-break/>tini ḍhaka jacchen. [He/She is going to Dhaka.]<text:line-break/>tini baṛi jacchen. [He/She is going home.]</text:span><text:span text:style-name="T4"/></text:p>
      <text:h text:style-name="P3" text:outline-level="3" loext:marker-style-name="T3"><text:span text:style-name="T3">Possessives</text:span><text:span text:style-name="T3"/></text:h>
      <text:p text:style-name="P4" loext:marker-style-name="T4"><text:span text:style-name="T4">tãr [his/her]/ [his/hers]<text:line-break/>tãr ekṭi gaṛi ache. [He/She has a car.]<text:line-break/>tãr boi [His/Her book]<text:line-break/>ei boiṭi tãr. [This book is his/hers.]<text:line-break/>ei gaṛiṭi tãr. [This car is his/hers.]</text:span><text:span text:style-name="T4"/></text:p>
      <text:h text:style-name="P3" text:outline-level="3" loext:marker-style-name="T3"><text:span text:style-name="T3">Object</text:span><text:span text:style-name="T3"/></text:h>
      <text:p text:style-name="P4" loext:marker-style-name="T4"><text:span text:style-name="T4">tãke [Him/Her]<text:line-break/>ami tãke cini. [I know him/her.] (Statement.)<text:line-break/>(tumi) tãke ḍako. [You call him/her.] (Command)</text:span><text:span text:style-name="T4"/></text:p>
      <text:p text:style-name="P5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ntium Book Plus" svg:font-family="'Gentium Book Plus'" style:font-family-generic="roman"/>
    <style:font-face style:name="July" svg:font-family="July" style:font-family-generic="roman"/>
    <style:font-face style:name="Liberation Serif" svg:font-family="'Liberation Serif'" style:font-family-generic="roman"/>
    <style:font-face style:name="Microsoft YaHei" svg:font-family="'Microsoft YaHei'" style:font-family-generic="roman"/>
    <style:font-face style:name="Mukti Narrow" svg:font-family="'Mukti Narrow'" style:font-family-generic="roman"/>
    <style:font-face style:name="NSimSun" svg:font-family="NSimSun" style:font-family-generic="roman"/>
    <style:font-face style:name="NSimSun1" svg:font-family="NSimSun" style:font-family-generic="swiss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Gentium Book Plus" fo:font-size="12pt" fo:language="en" fo:country="GB" style:letter-kerning="true" style:font-name-asian="NSimSun" style:font-size-asian="12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Gentium Book Plus" fo:font-size="12pt" fo:language="en" fo:country="GB" style:letter-kerning="true" style:font-name-asian="NSimSun" style:font-size-asian="12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Gentium Book Plus" fo:font-family="'Gentium Book Plus'" style:font-family-generic="roman" fo:font-size="12pt" fo:language="en" fo:country="GB" style:letter-kerning="true" style:font-name-asian="NSimSun" style:font-family-asian="NSimSun" style:font-family-generic-asian="roman" style:font-size-asian="12pt" style:language-asian="zh" style:country-asian="CN" style:font-name-complex="July" style:font-family-complex="July" style:font-family-generic-complex="roman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Gentium Book Plus" fo:font-family="'Gentium Book Plus'" style:font-family-generic="roman" fo:font-size="14pt" style:font-name-asian="Microsoft YaHei" style:font-family-asian="'Microsoft YaHei'" style:font-family-generic-asian="roman" style:font-size-asian="14pt" style:font-name-complex="July" style:font-family-complex="July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Gentium Book Plus" fo:font-family="'Gentium Book Plus'" style:font-family-generic="roman" style:font-name-complex="July" style:font-family-complex="July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Gentium Book Plus" fo:font-family="'Gentium Book Plus'" style:font-family-generic="roman" fo:font-size="12pt" fo:font-style="italic" style:font-size-asian="12pt" style:font-style-asian="italic" style:font-name-complex="July" style:font-family-complex="July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ook Plus" fo:font-family="'Gentium Book Plus'" style:font-family-generic="roman" style:font-name-complex="July" style:font-family-complex="July" style:font-family-generic-complex="roman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4.23mm" fo:margin-bottom="2.12mm" style:contextual-spacing="false"/>
      <style:text-properties style:font-name="Liberation Serif" fo:font-family="'Liberation Serif'" style:font-family-generic="roman" fo:font-size="24pt" fo:font-weight="bold" style:font-name-asian="NSimSun1" style:font-family-asian="NSimSun" style:font-family-generic-asian="swiss" style:font-size-asian="24pt" style:font-weight-asian="bold" style:font-name-complex="Mukti Narrow" style:font-family-complex="'Mukti Narrow'" style:font-family-generic-complex="roman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3.53mm" fo:margin-bottom="2.12mm" style:contextual-spacing="false"/>
      <style:text-properties style:font-name="Liberation Serif" fo:font-family="'Liberation Serif'" style:font-family-generic="roman" fo:font-size="18pt" fo:font-weight="bold" style:font-name-asian="NSimSun1" style:font-family-asian="NSimSun" style:font-family-generic-asian="swiss" style:font-size-asian="18pt" style:font-weight-asian="bold" style:font-name-complex="Mukti Narrow" style:font-family-complex="'Mukti Narrow'" style:font-family-generic-complex="roman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2.47mm" fo:margin-bottom="2.12mm" style:contextual-spacing="false"/>
      <style:text-properties style:font-name="Liberation Serif" fo:font-family="'Liberation Serif'" style:font-family-generic="roman" fo:font-size="14pt" fo:font-weight="bold" style:font-name-asian="NSimSun1" style:font-family-asian="NSimSun" style:font-family-generic-asian="swiss" style:font-size-asian="14pt" style:font-weight-asian="bold" style:font-name-complex="Mukti Narrow" style:font-family-complex="'Mukti Narrow'" style:font-family-generic-complex="roman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20:29:37</meta:creation-date>
    <dc:language>bn-BD</dc:language>
    <dc:date>2026-06-21T20:30:34</dc:date>
    <meta:editing-cycles>1</meta:editing-cycles>
    <meta:editing-duration>P0D</meta:editing-duration>
    <meta:generator>LibreOffice/26.2.4.2$Linux_X86_64 LibreOffice_project/620$Build-2</meta:generator>
    <meta:document-statistic meta:table-count="0" meta:image-count="0" meta:object-count="0" meta:page-count="4" meta:paragraph-count="37" meta:word-count="275" meta:character-count="1629" meta:non-whitespace-character-count="1391"/>
    <meta:user-defined meta:name="AppVersion">15.0000</meta:user-defined>
  </office:meta>
</office:document-meta>
</file>