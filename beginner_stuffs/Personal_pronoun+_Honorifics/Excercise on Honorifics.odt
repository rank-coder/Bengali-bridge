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ntium Book Plus" svg:font-family="'Gentium Book Plus'" style:font-family-generic="roman"/>
    <style:font-face style:name="July" svg:font-family="July" style:font-family-generic="roman"/>
    <style:font-face style:name="Liberation Serif" svg:font-family="'Liberation Serif'" style:font-family-generic="roman"/>
    <style:font-face style:name="Microsoft YaHei" svg:font-family="'Microsoft YaHei'" style:font-family-generic="roman"/>
    <style:font-face style:name="Mukti Narrow" svg:font-family="'Mukti Narrow'" style:font-family-generic="roman"/>
    <style:font-face style:name="NSimSun" svg:font-family="NSimSun" style:font-family-generic="roman"/>
    <style:font-face style:name="NSimSun1" svg:font-family="NSimSun" style:font-family-generic="swiss"/>
  </office:font-face-decls>
  <office:automatic-styles>
    <style:style style:name="P1" style:family="paragraph" style:parent-style-name="Heading_20_2">
      <style:paragraph-properties fo:margin-top="3.53mm" fo:margin-bottom="2.12mm" style:contextual-spacing="false" fo:text-align="left" style:justify-single-word="false" style:writing-mode="lr-tb"/>
    </style:style>
    <style:style style:name="P2" style:family="paragraph" style:parent-style-name="Heading_20_3">
      <style:paragraph-properties fo:margin-left="0mm" fo:margin-right="0mm" fo:margin-top="7.76mm" fo:margin-bottom="3.88mm" style:contextual-spacing="false" fo:line-height="130%" fo:text-align="left" style:justify-single-word="false" fo:text-indent="0mm" style:auto-text-indent="false" style:writing-mode="lr-tb"/>
    </style:style>
    <style:style style:name="P3" style:family="paragraph" style:parent-style-name="Text_20_body">
      <style:paragraph-properties fo:margin-left="0mm" fo:margin-right="0mm" fo:margin-top="0mm" fo:margin-bottom="4.23mm" style:contextual-spacing="false" fo:line-height="165%" fo:text-align="left" style:justify-single-word="false" fo:text-indent="0mm" style:auto-text-indent="false" style:writing-mode="lr-tb"/>
    </style:style>
    <style:style style:name="P4" style:family="paragraph" style:parent-style-name="Standard">
      <style:paragraph-properties fo:text-align="left" style:justify-single-word="false" style:writing-mode="lr-tb"/>
      <style:text-properties style:font-name="Gentium Book Plus" style:font-name-complex="Gentium Book Plus"/>
    </style:style>
    <style:style style:name="T1" style:family="text">
      <style:text-properties fo:color="#0f172a" loext:opacity="100%" style:font-name="Gentium Book Plus" fo:font-size="18pt" fo:font-weight="bold" style:font-size-asian="18pt" style:font-weight-asian="bold" style:font-name-complex="Gentium Book Plus"/>
    </style:style>
    <style:style style:name="T2" style:family="text">
      <style:text-properties fo:color="#0f172a" loext:opacity="100%" style:font-name="Gentium Book Plus" fo:font-size="15pt" fo:font-weight="bold" style:font-size-asian="15pt" style:font-weight-asian="bold" style:font-name-complex="Gentium Book Plus"/>
    </style:style>
    <style:style style:name="T3" style:family="text">
      <style:text-properties style:font-name="Gentium Book Plus" fo:font-size="11pt" style:font-size-asian="11pt" style:font-name-complex="Gentium Book Plus"/>
    </style:style>
    <style:style style:name="T4" style:family="text">
      <style:text-properties style:font-name="Gentium Book Plus" style:font-name-complex="Gentium Book Plus" style:font-size-complex="11pt"/>
    </style:style>
    <style:style style:name="T5" style:family="text">
      <style:text-properties style:font-name="Gentium Book Plus" style:font-name-complex="Gentium Book Pl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loext:marker-style-name="T1"><text:span text:style-name="T1">Excercise on [[Honorifics]]</text:span><text:span text:style-name="T1"/></text:h>
      <text:h text:style-name="P2" text:outline-level="3" loext:marker-style-name="T2"><text:span text:style-name="T2">Correct the highlighted (or underlined) mistakes</text:span><text:span text:style-name="T2"/></text:h>
      <text:p text:style-name="P3"><text:span text:style-name="T3">amar nana ëkbar khub öshustho hoye poṛechilen. ==take== niye amar böṛo mama jela shödorer hashpatale ==gëlo==. hashpataler ḍaktar ==bolechilo==, köyekdin rogike hashpatale thakte höbe. oi shömöy nana tin-car din hashpatale ==chilo==. ma hashpatal theke nanar sheba ==korto==.<text:line-break/></text:span><text:span text:style-name="Emphasis"><text:span text:style-name="T3">My grandfather once became very sick. Taking him, my elder uncle went to the district hospital. The hospital doctor said, for a few days the patient must stay in the hospital. At that time grandfather was in the hospital for three or four days. Mother from the hospital used to care for grandfather.</text:span></text:span><text:span text:style-name="T3"><text:line-break/></text:span><text:span text:style-name="T4">আমার নানা একবার খুব অসুস্থ হয়ে পড়েছিলেন। তাকে নিয়ে আমার বড়ো মামা জেলা সদরের হাসপাতালে গেল। হাসপাতালের ডাক্তার বলেছিল</text:span><text:span text:style-name="T3">, </text:span><text:span text:style-name="T4">কয়েকদিন রোগীকে হাসপাতালে থাকতে হবে। ওই সময় নানা তিন</text:span><text:span text:style-name="T3">-</text:span><text:span text:style-name="T4">চার দিন হাসপাতালে ছিল। মা হাসপাতাল থেকে নানার সেবা করত।</text:span></text:p>
      <text:p text:style-name="P3"><text:span text:style-name="T3">ëkdin bikale ami böṛo mamar sathe hashpatale giyechilam nanake dekhte. ëto böṛo hashpatal ami age dekhini. joruri bibhager shamne ekṭu pörpör-i rogi ashche. ar shekhankar ḍaktar-nars rogi niye bësto hoye ==poṛche==. beshi loker bhiṛ dekhe daroan barbar ==bolche==, '==tomra== ekhane bhiṛ korben na.'<text:line-break/></text:span><text:span text:style-name="Emphasis"><text:span text:style-name="T3">One afternoon I went with my elder uncle to the hospital to see grandfather. Such a big hospital I had not seen before. In front of the emergency department patients were coming every now and then. And the doctors and nurses there were becoming busy with those patients. Seeing the crowd of many people the doorman was repeatedly saying, “You all do not crowd here.”</text:span></text:span><text:span text:style-name="T3"><text:line-break/></text:span><text:span text:style-name="T4">একদিন বিকালে আমি বড়ো মামার সাথে হাসপাতালে গিয়েছিলাম নানাকে দেখতে। এত বড়ো হাসপাতাল আমি আগে দেখিনি। জরুরি বিভাগের সামনে একটু পরপরই রোগী আসছে। আর সেখানকার ডাক্তার</text:span><text:span text:style-name="T3">-</text:span><text:span text:style-name="T4">নার্স সেসব রোগী নিয়ে ব্যস্ত হয়ে পড়ছে। বেশি লোকের ভিড় দেখে দারোয়ান বারবার বলছে</text:span><text:span text:style-name="T3">, ‘</text:span><text:span text:style-name="T4">তোমরা এখানে ভিড় করবেন না।’</text:span></text:p>
      <text:p text:style-name="P3"><text:span text:style-name="T3">nana amake dekhe khub khushi ==holo==. tobu tini ==bollo==, 'tui abar ashte ==gele== keno?' nana amake ador kore tui kore ==böle==. ami choṭobëlay nanake tumi kore boltam. ëkhon ==take== apni kore boli. ami nanar köthar uttor bollam, 'nanabhai, apni druto shustho hoye ==jabe==.'<text:line-break/></text:span><text:span text:style-name="Emphasis"><text:span text:style-name="T3">Grandfather seeing me became very happy. Yet he said, “Why did you again come?” Grandfather affectionately </text:span></text:span><text:soft-page-break/><text:span text:style-name="Emphasis"><text:span text:style-name="T3">addresses me with tui. In childhood I used to address grandfather with tumi. Now I address him with apni. In reply to grandfather’s words I said, “Grandfather, you will quickly become well.”</text:span></text:span><text:span text:style-name="T3"><text:line-break/></text:span><text:span text:style-name="T4">নানা আমাকে দেখে খুব খুশি হলো। তবু তিনি বলল</text:span><text:span text:style-name="T3">, ‘</text:span><text:span text:style-name="T4">তুই আবার আসতে গেলে কেন</text:span><text:span text:style-name="T3">?’ </text:span><text:span text:style-name="T4">নানা আমাকে আদর করে তুই করে বলে। আমি ছোটবেলায় নানাকে তুমি করে বলতাম। এখন তাকে আপনি করে বলি। আমি নানার কথার উত্তরে বললাম</text:span><text:span text:style-name="T3">, ‘</text:span><text:span text:style-name="T4">নানাভাই</text:span><text:span text:style-name="T3">, </text:span><text:span text:style-name="T4">আপনি দ্রুত সুস্থ হয়ে যাবে।’</text:span></text:p>
      <text:p text:style-name="P3"><text:span text:style-name="T3">khanik bade ëkjon nars eshe nanake oshudh khaie ==gëlo==. ==she== bollen kal nanake hashpatal theke cheṛe debe. shondhar age age böṛo mama jaoar jonne uṭhe dãṛalen. tarpör ==bollo==, '==cölo==, ebar jai; kal shökale abar ashish.' ami bollam, '==cölo==, mama.'<text:line-break/></text:span><text:span text:style-name="Emphasis"><text:span text:style-name="T3">After a while a nurse came and gave medicine to grandfather. She said tomorrow grandfather will be released from the hospital. Before evening elder uncle stood up to go. Then he said, “Come, now let us go; tomorrow morning come again.” I said, “Come, uncle.”</text:span></text:span><text:span text:style-name="T3"><text:line-break/></text:span><text:span text:style-name="T4">খানিক বাদে একজন নার্স এসে নানাকে ওষুধ খাইয়ে গেল। সে বললেন কাল নানাকে হাসপাতাল থেকে ছেড়ে দেবে। সন্ধ্যার আগে আগে বড়ো মামা যাওয়ার জন্যে উঠে দাঁড়ালেন। তারপর বলল</text:span><text:span text:style-name="T3">, ‘</text:span><text:span text:style-name="T4">চলো</text:span><text:span text:style-name="T3">, </text:span><text:span text:style-name="T4">এবার যাই</text:span><text:span text:style-name="T3">; </text:span><text:span text:style-name="T4">কাল সকালে আবার আসিস।’ আমি বললাম ‘চলো</text:span><text:span text:style-name="T3">, </text:span><text:span text:style-name="T4">মামা।’</text:span></text:p>
      <text:p text:style-name="P3" loext:marker-style-name="T3"><text:span text:style-name="T3">See also: [[Whiteboard for Personal Pronouns &amp; Honorifics]]</text:span><text:span text:style-name="T3"/></text:p>
      <text:p text:style-name="P4" loext:marker-style-name="T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ntium Book Plus" svg:font-family="'Gentium Book Plus'" style:font-family-generic="roman"/>
    <style:font-face style:name="July" svg:font-family="July" style:font-family-generic="roman"/>
    <style:font-face style:name="Liberation Serif" svg:font-family="'Liberation Serif'" style:font-family-generic="roman"/>
    <style:font-face style:name="Microsoft YaHei" svg:font-family="'Microsoft YaHei'" style:font-family-generic="roman"/>
    <style:font-face style:name="Mukti Narrow" svg:font-family="'Mukti Narrow'" style:font-family-generic="roman"/>
    <style:font-face style:name="NSimSun" svg:font-family="NSimSun" style:font-family-generic="roman"/>
    <style:font-face style:name="NSimSun1" svg:font-family="NSimSun" style:font-family-generic="swiss"/>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Gentium Book Plus" fo:font-size="12pt" fo:language="en" fo:country="GB" style:letter-kerning="true" style:font-name-asian="NSimSun" style:font-size-asian="12pt" style:language-asian="zh" style:country-asian="CN" style:font-name-complex="July" style:font-size-complex="12pt" style:language-complex="bn" style:country-complex="BD"/>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mm" style:writing-mode="page"/>
      <style:text-properties style:use-window-font-color="true" loext:opacity="0%" style:font-name="Gentium Book Plus" fo:font-size="12pt" fo:language="en" fo:country="GB" style:letter-kerning="true" style:font-name-asian="NSimSun" style:font-size-asian="12pt" style:language-asian="zh" style:country-asian="CN" style:font-name-complex="July"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Gentium Book Plus" fo:font-family="'Gentium Book Plus'" style:font-family-generic="roman" fo:font-size="12pt" fo:language="en" fo:country="GB" style:letter-kerning="true" style:font-name-asian="NSimSun" style:font-family-asian="NSimSun" style:font-family-generic-asian="roman" style:font-size-asian="12pt" style:language-asian="zh" style:country-asian="CN" style:font-name-complex="July" style:font-family-complex="July" style:font-family-generic-complex="roman" style:font-size-complex="12pt" style:language-complex="bn" style:country-complex="BD"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Gentium Book Plus" fo:font-family="'Gentium Book Plus'" style:font-family-generic="roman" fo:font-size="14pt" style:font-name-asian="Microsoft YaHei" style:font-family-asian="'Microsoft YaHei'" style:font-family-generic-asian="roman" style:font-size-asian="14pt" style:font-name-complex="July" style:font-family-complex="July" style:font-family-generic-complex="roman"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Gentium Book Plus" fo:font-family="'Gentium Book Plus'" style:font-family-generic="roman" style:font-name-complex="July" style:font-family-complex="July" style:font-family-generic-complex="roman"/>
    </style:style>
    <style:style style:name="Caption" style:family="paragraph" style:parent-style-name="Standard" style:class="extra">
      <style:paragraph-properties fo:margin-top="2.12mm" fo:margin-bottom="2.12mm" style:contextual-spacing="false" text:number-lines="false" text:line-number="0"/>
      <style:text-properties style:font-name="Gentium Book Plus" fo:font-family="'Gentium Book Plus'" style:font-family-generic="roman" fo:font-size="12pt" fo:font-style="italic" style:font-size-asian="12pt" style:font-style-asian="italic" style:font-name-complex="July" style:font-family-complex="July"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Gentium Book Plus" fo:font-family="'Gentium Book Plus'" style:font-family-generic="roman" style:font-name-complex="July" style:font-family-complex="July" style:font-family-generic-complex="roman"/>
    </style:style>
    <style:style style:name="Heading_20_2" style:display-name="Heading 2" style:family="paragraph" style:parent-style-name="Heading" style:next-style-name="Text_20_body" style:default-outline-level="2" style:list-style-name="" style:class="chapter">
      <style:paragraph-properties fo:margin-top="3.53mm" fo:margin-bottom="2.12mm" style:contextual-spacing="false"/>
      <style:text-properties style:font-name="Liberation Serif" fo:font-family="'Liberation Serif'" style:font-family-generic="roman" fo:font-size="18pt" fo:font-weight="bold" style:font-name-asian="NSimSun1" style:font-family-asian="NSimSun" style:font-family-generic-asian="swiss" style:font-size-asian="18pt" style:font-weight-asian="bold" style:font-name-complex="Mukti Narrow" style:font-family-complex="'Mukti Narrow'" style:font-family-generic-complex="roman"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2.47mm" fo:margin-bottom="2.12mm" style:contextual-spacing="false"/>
      <style:text-properties style:font-name="Liberation Serif" fo:font-family="'Liberation Serif'" style:font-family-generic="roman" fo:font-size="14pt" fo:font-weight="bold" style:font-name-asian="NSimSun1" style:font-family-asian="NSimSun" style:font-family-generic-asian="swiss" style:font-size-asian="14pt" style:font-weight-asian="bold" style:font-name-complex="Mukti Narrow" style:font-family-complex="'Mukti Narrow'" style:font-family-generic-complex="roman"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570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1T20:31:34</meta:creation-date>
    <dc:language>bn-BD</dc:language>
    <dc:date>2026-06-21T20:32:16</dc:date>
    <meta:editing-cycles>1</meta:editing-cycles>
    <meta:editing-duration>P0D</meta:editing-duration>
    <meta:generator>LibreOffice/26.2.4.2$Linux_X86_64 LibreOffice_project/620$Build-2</meta:generator>
    <meta:document-statistic meta:table-count="0" meta:image-count="0" meta:object-count="0" meta:page-count="2" meta:paragraph-count="7" meta:word-count="553" meta:character-count="3128" meta:non-whitespace-character-count="2582"/>
    <meta:user-defined meta:name="AppVersion">15.0000</meta:user-defined>
  </office:meta>
</office:document-meta>
</file>