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1.75mm" style:rel-column-width="8383*"/>
    </style:style>
    <style:style style:name="Table1.B" style:family="table-column">
      <style:table-column-properties style:column-width="25.1mm" style:rel-column-width="9675*"/>
    </style:style>
    <style:style style:name="Table1.C" style:family="table-column">
      <style:table-column-properties style:column-width="23.28mm" style:rel-column-width="8975*"/>
    </style:style>
    <style:style style:name="Table1.D" style:family="table-column">
      <style:table-column-properties style:column-width="32.4mm" style:rel-column-width="12490*"/>
    </style:style>
    <style:style style:name="Table1.E" style:family="table-column">
      <style:table-column-properties style:column-width="33.97mm" style:rel-column-width="13096*"/>
    </style:style>
    <style:style style:name="Table1.F" style:family="table-column">
      <style:table-column-properties style:column-width="33.51mm" style:rel-column-width="12916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F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F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2.74mm" style:rel-column-width="8764*"/>
    </style:style>
    <style:style style:name="Table2.B" style:family="table-column">
      <style:table-column-properties style:column-width="29.99mm" style:rel-column-width="11559*"/>
    </style:style>
    <style:style style:name="Table2.C" style:family="table-column">
      <style:table-column-properties style:column-width="24.34mm" style:rel-column-width="9383*"/>
    </style:style>
    <style:style style:name="Table2.D" style:family="table-column">
      <style:table-column-properties style:column-width="33.87mm" style:rel-column-width="13055*"/>
    </style:style>
    <style:style style:name="Table2.F" style:family="table-column">
      <style:table-column-properties style:column-width="25.21mm" style:rel-column-width="971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F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F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Gentium Book Plus" fo:font-weight="500"/>
    </style:style>
    <style:style style:name="T1" style:family="text">
      <style:text-properties fo:font-family="'Gentium Book Plus'" style:font-pitch="variable"/>
    </style:style>
    <style:style style:name="T2" style:family="text">
      <style:text-properties officeooo:rsid="0011e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sonal Pronoun</text:p>
      <text:p text:style-name="Body_20_Text_20__28_BnBridge_29_"><text:span text:style-name="T1">Quick review: A </text:span><text:span text:style-name="Strong_20_Emphasis"><text:span text:style-name="T1">personal pronoun</text:span></text:span><text:span text:style-name="T1"> is a pronoun that refers to a specific person or thing and </text:span><text:span text:style-name="Emphasis"><text:span text:style-name="T1">changes form</text:span></text:span><text:span text:style-name="T1"> according to </text:span><text:span text:style-name="Strong_20_Emphasis"><text:span text:style-name="T1">person</text:span></text:span><text:span text:style-name="T1">, </text:span><text:span text:style-name="Strong_20_Emphasis"><text:span text:style-name="T1">number</text:span></text:span><text:span text:style-name="T1">, and </text:span><text:span text:style-name="Strong_20_Emphasis"><text:span text:style-name="T1">case</text:span></text:span><text:span text:style-name="T1">.</text:span></text:p>
      <text:h text:style-name="Heading_20_1" text:outline-level="1">Lvl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er">Person</text:p>
            </table:table-cell>
            <table:table-cell table:style-name="Table1.A1" office:value-type="string">
              <text:p text:style-name="Table_20_Header">Number</text:p>
            </table:table-cell>
            <table:table-cell table:style-name="Table1.A1" office:value-type="string">
              <text:p text:style-name="Table_20_Header">Subject</text:p>
            </table:table-cell>
            <table:table-cell table:style-name="Table1.A1" office:value-type="string">
              <text:p text:style-name="Table_20_Header">Possessive<text:line-break/>Determiner</text:p>
            </table:table-cell>
            <table:table-cell table:style-name="Table1.A1" office:value-type="string">
              <text:p text:style-name="Table_20_Header">Possessive <text:line-break/>Pronoun</text:p>
            </table:table-cell>
            <table:table-cell table:style-name="Table1.F1" office:value-type="string">
              <text:p text:style-name="Table_20_Header">Object</text:p>
            </table:table-cell>
          </table:table-row>
        </table:table-header-rows>
        <table:table-row>
          <table:table-cell table:style-name="Table1.A2" table:number-rows-spanned="2" office:value-type="string">
            <text:p text:style-name="Table_20_Header">1st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ami<text:line-break/>[I]</text:p>
          </table:table-cell>
          <table:table-cell table:style-name="Table1.A2" office:value-type="string">
            <text:p text:style-name="Table_20_Content_20__28_diacrited_29_">amar<text:line-break/>[My]</text:p>
          </table:table-cell>
          <table:table-cell table:style-name="Table1.A2" office:value-type="string">
            <text:p text:style-name="Table_20_Content_20__28_diacrited_29_">amar<text:line-break/>[Mine]</text:p>
          </table:table-cell>
          <table:table-cell table:style-name="Table1.F2" office:value-type="string">
            <text:p text:style-name="Table_20_Content_20__28_diacrited_29_">amake<text:line-break/>[Me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amra<text:line-break/>[We]</text:p>
          </table:table-cell>
          <table:table-cell table:style-name="Table1.A2" office:value-type="string">
            <text:p text:style-name="Table_20_Content_20__28_diacrited_29_">amader<text:line-break/>[Our]</text:p>
          </table:table-cell>
          <table:table-cell table:style-name="Table1.A2" office:value-type="string">
            <text:p text:style-name="Table_20_Content_20__28_diacrited_29_">amader<text:line-break/>[Ours]</text:p>
          </table:table-cell>
          <table:table-cell table:style-name="Table1.F2" office:value-type="string">
            <text:p text:style-name="Table_20_Content_20__28_diacrited_29_">amaderke<text:line-break/>[Us]</text:p>
          </table:table-cell>
        </table:table-row>
        <table:table-row>
          <table:table-cell table:style-name="Table1.A2" table:number-rows-spanned="2" office:value-type="string">
            <text:p text:style-name="Table_20_Header">2nd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tumi<text:line-break/>[You]</text:p>
          </table:table-cell>
          <table:table-cell table:style-name="Table1.A2" office:value-type="string">
            <text:p text:style-name="Table_20_Content_20__28_diacrited_29_">tomar<text:line-break/>[Your]</text:p>
          </table:table-cell>
          <table:table-cell table:style-name="Table1.A2" office:value-type="string">
            <text:p text:style-name="Table_20_Content_20__28_diacrited_29_">tomar<text:line-break/>[Yours]</text:p>
          </table:table-cell>
          <table:table-cell table:style-name="Table1.F2" office:value-type="string">
            <text:p text:style-name="Table_20_Content_20__28_diacrited_29_">tomake<text:line-break/>[You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tomra<text:line-break/>[You]</text:p>
          </table:table-cell>
          <table:table-cell table:style-name="Table1.A2" office:value-type="string">
            <text:p text:style-name="Table_20_Content_20__28_diacrited_29_">tomader<text:line-break/>[Your]</text:p>
          </table:table-cell>
          <table:table-cell table:style-name="Table1.A2" office:value-type="string">
            <text:p text:style-name="Table_20_Content_20__28_diacrited_29_">tomader<text:line-break/>[Yours]</text:p>
          </table:table-cell>
          <table:table-cell table:style-name="Table1.F2" office:value-type="string">
            <text:p text:style-name="Table_20_Content_20__28_diacrited_29_">tomaderke<text:line-break/>[You]</text:p>
          </table:table-cell>
        </table:table-row>
        <table:table-row>
          <table:table-cell table:style-name="Table1.A2" table:number-rows-spanned="2" office:value-type="string">
            <text:p text:style-name="Table_20_Header">3rd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she<text:line-break/>[He/She]</text:p>
          </table:table-cell>
          <table:table-cell table:style-name="Table1.A2" office:value-type="string">
            <text:p text:style-name="Table_20_Content_20__28_diacrited_29_">tar<text:line-break/>[His/Her]</text:p>
          </table:table-cell>
          <table:table-cell table:style-name="Table1.A2" office:value-type="string">
            <text:p text:style-name="Table_20_Content_20__28_diacrited_29_">tar<text:line-break/>[His/Hers]</text:p>
          </table:table-cell>
          <table:table-cell table:style-name="Table1.F2" office:value-type="string">
            <text:p text:style-name="Table_20_Content_20__28_diacrited_29_">take<text:line-break/>[Him/Her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tara<text:line-break/>[They]</text:p>
          </table:table-cell>
          <table:table-cell table:style-name="Table1.A2" office:value-type="string">
            <text:p text:style-name="Table_20_Content_20__28_diacrited_29_">tader<text:line-break/>[Their]</text:p>
          </table:table-cell>
          <table:table-cell table:style-name="Table1.A2" office:value-type="string">
            <text:p text:style-name="Table_20_Content_20__28_diacrited_29_">tader<text:line-break/>[Theirs]</text:p>
          </table:table-cell>
          <table:table-cell table:style-name="Table1.F2" office:value-type="string">
            <text:p text:style-name="Table_20_Content_20__28_diacrited_29_">taderke<text:line-break/>[Them]</text:p>
          </table:table-cell>
        </table:table-row>
      </table:table>
      <text:p text:style-name="Text_20_body"/>
      <text:h text:style-name="Note_20_Header" text:outline-level="4">Note</text:h>
      <text:p text:style-name="Note_20_Content">/ra/ ending usually marks plural for the subject</text:p>
      <text:h text:style-name="Note_20_Header" text:outline-level="4">Note</text:h>
      <text:p text:style-name="Note_20_Content">You must have noticed that, in Bengali, <text:span text:style-name="Emphasis">possessive determiner</text:span> form and <text:span text:style-name="Emphasis">possessive pronoun</text:span> form look exactly the same.</text:p>
      <text:h text:style-name="Note_20_Header" text:outline-level="4">Note</text:h>
      <text:p text:style-name="Note_20_Content">/r/ ending:<text:line-break/>Note that, singular possessive form ends with /r/</text:p>
      <text:h text:style-name="Note_20_Header" text:outline-level="4"><text:soft-page-break/>Note</text:h>
      <text:p text:style-name="Note_20_Content">/der/ ending:<text:line-break/>plural possessive form ends with /der/</text:p>
      <text:p text:style-name="Note_20_Header">Note</text:p>
      <text:p text:style-name="Note_20_Content">/ke/ ending:<text:line-break/>Note that, object form ends with /ke/</text:p>
      <text:p text:style-name="Note_20_Header">Note</text:p>
      <text:p text:style-name="Note_20_Content">/der ke/ ending:<text:line-break/>Plural object form ends with /derke/</text:p>
      <text:p text:style-name="P1">See also: Whiteboard for Personal Pronoun Lvl1</text:p>
      <text:h text:style-name="Heading_20_1" text:outline-level="1">Lvl 2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Table_20_Header">Person</text:p>
          </table:table-cell>
          <table:table-cell table:style-name="Table2.A1" office:value-type="string">
            <text:p text:style-name="Table_20_Header">Hon<text:span text:style-name="T2">orific</text:span> <text:line-break/>L<text:span text:style-name="T2">evel</text:span></text:p>
          </table:table-cell>
          <table:table-cell table:style-name="Table2.A1" office:value-type="string">
            <text:p text:style-name="Table_20_Header">Subject</text:p>
          </table:table-cell>
          <table:table-cell table:style-name="Table2.A1" office:value-type="string">
            <text:p text:style-name="Table_20_Header">Pos<text:span text:style-name="T2">sessive<text:line-break/>Determiner</text:span></text:p>
          </table:table-cell>
          <table:table-cell table:style-name="Table2.A1" office:value-type="string">
            <text:p text:style-name="Table_20_Header">Pos<text:span text:style-name="T2">sessive<text:line-break/>Pronoun</text:span></text:p>
          </table:table-cell>
          <table:table-cell table:style-name="Table2.F1" office:value-type="string">
            <text:p text:style-name="Table_20_Header">Object</text:p>
          </table:table-cell>
        </table:table-row>
        <table:table-row>
          <table:table-cell table:style-name="Table2.A2" table:number-rows-spanned="3" office:value-type="string">
            <text:p text:style-name="Table_20_Header">2nd</text:p>
          </table:table-cell>
          <table:table-cell table:style-name="Table2.A2" office:value-type="string">
            <text:p text:style-name="Table_20_Header">neutral</text:p>
          </table:table-cell>
          <table:table-cell table:style-name="Table2.A2" office:value-type="string">
            <text:p text:style-name="Table_20_Content_20__28_diacrited_29_">tumi</text:p>
          </table:table-cell>
          <table:table-cell table:style-name="Table2.A2" office:value-type="string">
            <text:p text:style-name="Table_20_Content_20__28_diacrited_29_">tomar</text:p>
          </table:table-cell>
          <table:table-cell table:style-name="Table2.A2" office:value-type="string">
            <text:p text:style-name="Table_20_Content_20__28_diacrited_29_">tomar</text:p>
          </table:table-cell>
          <table:table-cell table:style-name="Table2.F2" office:value-type="string">
            <text:p text:style-name="Table_20_Content_20__28_diacrited_29_">toma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low</text:p>
          </table:table-cell>
          <table:table-cell table:style-name="Table2.A2" office:value-type="string">
            <text:p text:style-name="Table_20_Content_20__28_diacrited_29_">tui</text:p>
          </table:table-cell>
          <table:table-cell table:style-name="Table2.A2" office:value-type="string">
            <text:p text:style-name="Table_20_Content_20__28_diacrited_29_">tor</text:p>
          </table:table-cell>
          <table:table-cell table:style-name="Table2.A2" office:value-type="string">
            <text:p text:style-name="Table_20_Content_20__28_diacrited_29_">tor</text:p>
          </table:table-cell>
          <table:table-cell table:style-name="Table2.F2" office:value-type="string">
            <text:p text:style-name="Table_20_Content_20__28_diacrited_29_">to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high</text:p>
          </table:table-cell>
          <table:table-cell table:style-name="Table2.A2" office:value-type="string">
            <text:p text:style-name="Table_20_Content_20__28_diacrited_29_">apni<text:line-break/>[You]</text:p>
          </table:table-cell>
          <table:table-cell table:style-name="Table2.A2" office:value-type="string">
            <text:p text:style-name="Table_20_Content_20__28_diacrited_29_">apnar<text:line-break/>[Your]</text:p>
          </table:table-cell>
          <table:table-cell table:style-name="Table2.A2" office:value-type="string">
            <text:p text:style-name="Table_20_Content_20__28_diacrited_29_">apnar<text:line-break/>[Your]</text:p>
          </table:table-cell>
          <table:table-cell table:style-name="Table2.F2" office:value-type="string">
            <text:p text:style-name="Table_20_Content_20__28_diacrited_29_">apnake<text:line-break/>[You]</text:p>
          </table:table-cell>
        </table:table-row>
        <table:table-row>
          <table:table-cell table:style-name="Table2.A2" table:number-rows-spanned="3" office:value-type="string">
            <text:p text:style-name="Table_20_Header">3rd</text:p>
          </table:table-cell>
          <table:table-cell table:style-name="Table2.A2" office:value-type="string">
            <text:p text:style-name="Table_20_Header">neutral</text:p>
          </table:table-cell>
          <table:table-cell table:style-name="Table2.A2" office:value-type="string">
            <text:p text:style-name="Table_20_Content_20__28_diacrited_29_">she</text:p>
          </table:table-cell>
          <table:table-cell table:style-name="Table2.A2" office:value-type="string">
            <text:p text:style-name="Table_20_Content_20__28_diacrited_29_">tar</text:p>
          </table:table-cell>
          <table:table-cell table:style-name="Table2.A2" office:value-type="string">
            <text:p text:style-name="Table_20_Content_20__28_diacrited_29_">tar</text:p>
          </table:table-cell>
          <table:table-cell table:style-name="Table2.F2" office:value-type="string">
            <text:p text:style-name="Table_20_Content_20__28_diacrited_29_">ta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low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F2" office:value-type="string">
            <text:p text:style-name="Table_20_Content_20__28_diacrited_29_">-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high</text:p>
          </table:table-cell>
          <table:table-cell table:style-name="Table2.A2" office:value-type="string">
            <text:p text:style-name="Table_20_Content_20__28_diacrited_29_">tini<text:line-break/>[He/She]</text:p>
          </table:table-cell>
          <table:table-cell table:style-name="Table2.A2" office:value-type="string">
            <text:p text:style-name="Table_20_Content_20__28_diacrited_29_">tãr<text:line-break/>[His/Her]</text:p>
          </table:table-cell>
          <table:table-cell table:style-name="Table2.A2" office:value-type="string">
            <text:p text:style-name="Table_20_Content_20__28_diacrited_29_">tãr<text:line-break/>[His/Hers]</text:p>
          </table:table-cell>
          <table:table-cell table:style-name="Table2.F2" office:value-type="string">
            <text:p text:style-name="Table_20_Content_20__28_diacrited_29_">tãke<text:line-break/>[Him/Her]</text:p>
          </table:table-cell>
        </table:table-row>
      </table:table>
      <text:p text:style-name="Note_20_Header">Note</text:p>
      <text:p text:style-name="Note_20_Content"><text:span text:style-name="Strong_20_Emphasis">No honorific levels</text:span> exist for the <text:span text:style-name="Strong_20_Emphasis">1st person</text:span>. Since these are actually <text:span text:style-name="Emphasis">levels of address</text:span>, and one cannot address oneself.</text:p>
      <text:p text:style-name="Note_20_Header">Note</text:p>
      <text:p text:style-name="Note_20_Content">There is no low level honorific for <text:span text:style-name="Strong_20_Emphasis">3rd person</text:span> pronouns.</text:p>
      <text:p text:style-name="Body_20_Text_20__28_BnBridge_29_"><text:soft-page-break/>See also: Whiteboard for Personal Pronouns_ Lvl2<text:line-break/>See also: Homework for Personal Pronouns_Lvl1&amp;2<text:line-break/>Must practice: Excercise on Honorific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style:font-name="Berlin Sans FB Demi" fo:font-family="'Berlin Sans FB Demi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style:font-name="Berlin Sans FB" fo:font-family="'Berlin Sans FB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ext_20_body">
      <style:text-properties fo:color="#2f4f4f" loext:opacity="100%" style:font-name="Franklin Gothic Book" fo:font-family="'Franklin Gothic Book'" style:font-family-generic="swiss" style:font-pitch="variable" fo:font-weight="bold" style:font-weight-asian="bold" style:font-weight-complex="bold"/>
    </style:style>
    <style:style style:name="Table_20_Content_20__28_diacrited_29_" style:display-name="Table Content (diacrited)" style:family="paragraph" style:parent-style-name="Text_20_body">
      <style:paragraph-properties fo:text-align="center" style:justify-single-word="false"/>
      <style:text-properties style:font-name="Clear Sans" fo:font-family="'Clear Sans'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te_20_Header" style:display-name="Note Header" style:family="paragraph" style:parent-style-name="Heading_20_4" style:default-outline-level="" style:list-style-name="">
      <style:text-properties fo:color="#43c330" loext:opacity="100%" style:font-name="Lobster Two" fo:font-family="'Lobster Two'" style:font-pitch="variabl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dy_20_Text_20__28_BnBridge_29_" style:display-name="Body Text (BnBridge)" style:family="paragraph" style:parent-style-name="Text_20_body">
      <style:text-properties style:font-name="Gentium Book Plus" fo:font-family="'Gentium Book Plus'" style:font-style-name="Regular" style:font-pitch="variable" fo:font-weight="500"/>
    </style:style>
    <style:style style:name="Note_20_Content" style:display-name="Note Content" style:family="paragraph" style:parent-style-name="Body_20_Text_20__28_BnBridge_29_">
      <loext:graphic-properties draw:fill="solid" draw:fill-color="#ccf4c6" draw:opacity="100%"/>
      <style:paragraph-properties fo:background-color="#ccf4c6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left" style:justify-single-word="false"/>
      <style:text-properties style:font-name="Lobster Two" fo:font-family="'Lobster Two'" style:font-pitch="variable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8:30:27.240303843</meta:creation-date>
    <dc:date>2026-05-26T22:00:18.190284347</dc:date>
    <meta:editing-duration>PT1H3M36S</meta:editing-duration>
    <meta:editing-cycles>19</meta:editing-cycles>
    <meta:generator>LibreOffice/26.2.2.2$Linux_X86_64 LibreOffice_project/620$Build-2</meta:generator>
    <meta:document-statistic meta:table-count="2" meta:image-count="0" meta:object-count="0" meta:page-count="3" meta:paragraph-count="99" meta:word-count="270" meta:character-count="1605" meta:non-whitespace-character-count="1432"/>
  </office:meta>
</office:document-meta>
</file>