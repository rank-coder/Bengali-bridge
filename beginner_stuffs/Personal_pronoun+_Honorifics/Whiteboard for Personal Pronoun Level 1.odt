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lear Sans" svg:font-family="'Clear Sans'" style:font-family-generic="swiss" style:font-pitch="variable"/>
    <style:font-face style:name="Franklin Gothic Book" svg:font-family="'Franklin Gothic Book'" style:font-family-generic="swiss" style:font-pitch="variable"/>
    <style:font-face style:name="Gentium Book Plus" svg:font-family="'Gentium Book Plus'" style:font-adornments="Regular" style:font-pitch="variable"/>
    <style:font-face style:name="July" svg:font-family="July"/>
    <style:font-face style:name="Lobster Two" svg:font-family="'Lobster Tw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ody_20_Text_20__28_BnBridge_29_" style:list-style-name="L1"/>
    <style:style style:name="P2" style:family="paragraph" style:parent-style-name="Body_20_Text_20__28_BnBridge_29_" style:list-style-name="L2"/>
    <style:style style:name="P3" style:family="paragraph" style:parent-style-name="Body_20_Text_20__28_BnBridge_29_" style:list-style-name="L3"/>
    <style:style style:name="P4" style:family="paragraph" style:parent-style-name="Body_20_Text_20__28_BnBridge_29_" style:list-style-name="L4"/>
    <style:style style:name="P5" style:family="paragraph" style:parent-style-name="Body_20_Text_20__28_BnBridge_29_" style:list-style-name="L5"/>
    <style:style style:name="P6" style:family="paragraph" style:parent-style-name="Body_20_Text_20__28_BnBridge_29_" style:list-style-name="L6"/>
    <style:style style:name="P7" style:family="paragraph" style:parent-style-name="Horizontal_20_Line">
      <style:paragraph-properties fo:margin-top="0mm" fo:margin-bottom="2.47mm" style:contextual-spacing="false" fo:line-height="115%"/>
    </style:style>
    <style:style style:name="P8" style:family="paragraph" style:parent-style-name="Body_20_Text_20__28_BnBridge_29_" style:list-style-name="L7"/>
    <style:style style:name="P9" style:family="paragraph" style:parent-style-name="Body_20_Text_20__28_BnBridge_29_" style:list-style-name="L8"/>
    <style:style style:name="P10" style:family="paragraph" style:parent-style-name="Body_20_Text_20__28_BnBridge_29_" style:list-style-name="L9"/>
    <style:style style:name="P11" style:family="paragraph" style:parent-style-name="Heading_20_2">
      <style:paragraph-properties fo:margin-top="0mm" fo:margin-bottom="2.47mm" style:contextual-spacing="false" fo:line-height="115%"/>
    </style:style>
    <style:style style:name="P12" style:family="paragraph" style:parent-style-name="Body_20_Text_20__28_BnBridge_29_" style:list-style-name="L10"/>
    <style:style style:name="P13" style:family="paragraph" style:parent-style-name="Body_20_Text_20__28_BnBridge_29_" style:list-style-name="L11"/>
    <style:style style:name="P14" style:family="paragraph" style:parent-style-name="Body_20_Text_20__28_BnBridge_29_" style:list-style-name="L12"/>
    <style:style style:name="P15" style:family="paragraph" style:parent-style-name="Body_20_Text_20__28_BnBridge_29_" style:list-style-name="L13"/>
    <style:style style:name="P16" style:family="paragraph" style:parent-style-name="Body_20_Text_20__28_BnBridge_29_" style:list-style-name="L14"/>
    <style:style style:name="P17" style:family="paragraph" style:parent-style-name="Body_20_Text_20__28_BnBridge_29_" style:list-style-name="L15"/>
    <style:style style:name="P18" style:family="paragraph" style:parent-style-name="Body_20_Text_20__28_BnBridge_29_" style:list-style-name="L16"/>
    <style:style style:name="P19" style:family="paragraph" style:parent-style-name="Body_20_Text_20__28_BnBridge_29_" style:list-style-name="L17"/>
    <style:style style:name="P20" style:family="paragraph" style:parent-style-name="Body_20_Text_20__28_BnBridge_29_" style:list-style-name="L18"/>
    <text:list-style style:name="L1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hiteboard for Personal Pronoun Level 1</text:p>
      <text:h text:style-name="Heading_20_1" text:outline-level="1">Subject Pronouns</text:h>
      <text:h text:style-name="Heading_20_2" text:outline-level="2">1st person singular subject</text:h>
      <text:list text:style-name="L1">
        <text:list-item>
          <text:p text:style-name="P1">ami onupöm. [I am Onupom.] </text:p>
        </text:list-item>
        <text:list-item>
          <text:p text:style-name="P1">ami jani. [I know.] </text:p>
          <text:p text:style-name="P1">S + O + V (Default Sentence Structure)</text:p>
        </text:list-item>
        <text:list-item>
          <text:p text:style-name="P1">ami bhat khai. [I eat rice.] </text:p>
        </text:list-item>
      </text:list>
      <text:h text:style-name="Heading_20_2" text:outline-level="2" text:is-list-header="true">1st person plural subject</text:h>
      <text:p text:style-name="Body_20_Text_20__28_BnBridge_29_">ami + ra = <text:span text:style-name="Emphasis">amra</text:span></text:p>
      <text:list text:style-name="L2">
        <text:list-item>
          <text:p text:style-name="P2">amra chattro. [We are students.] </text:p>
        </text:list-item>
        <text:list-item>
          <text:p text:style-name="P2">amra jani. [We know] </text:p>
        </text:list-item>
        <text:list-item>
          <text:p text:style-name="P2">amra bhat khai. [We eat rice.] </text:p>
        </text:list-item>
      </text:list>
      <text:h text:style-name="Heading_20_2" text:outline-level="2" text:is-list-header="true">2nd person singular subject</text:h>
      <text:p text:style-name="Body_20_Text_20__28_BnBridge_29_"><text:span text:style-name="Emphasis">tumi</text:span></text:p>
      <text:list text:style-name="L3">
        <text:list-item>
          <text:p text:style-name="P3">tumi rana. [You are Rana.] </text:p>
        </text:list-item>
        <text:list-item>
          <text:p text:style-name="P3">tumi jano. [You know.] </text:p>
        </text:list-item>
        <text:list-item>
          <text:p text:style-name="P3">tumi bhat khao. [You eat rice.] </text:p>
        </text:list-item>
      </text:list>
      <text:h text:style-name="Heading_20_2" text:outline-level="2" text:is-list-header="true">2nd person plural subject</text:h>
      <text:p text:style-name="Body_20_Text_20__28_BnBridge_29_">tumi + ra = <text:span text:style-name="Emphasis">tomra</text:span></text:p>
      <text:list text:style-name="L4">
        <text:list-item>
          <text:p text:style-name="P4">tomra chatro. [You are students.]<text:line-break/>We don't need plural nouns. </text:p>
        </text:list-item>
        <text:list-item>
          <text:p text:style-name="P4">tomra jano. [You all know.] </text:p>
        </text:list-item>
        <text:list-item>
          <text:p text:style-name="P4">tomra bhat khao. [You all eat rice.] </text:p>
        </text:list-item>
      </text:list>
      <text:h text:style-name="Heading_20_2" text:outline-level="2" text:is-list-header="true"><text:soft-page-break/>3rd person singular subject</text:h>
      <text:p text:style-name="Body_20_Text_20__28_BnBridge_29_"><text:span text:style-name="Emphasis">she</text:span> [He/She]</text:p>
      <text:list text:style-name="L5">
        <text:list-item>
          <text:p text:style-name="P5">she Rana. [He is Rana.] </text:p>
        </text:list-item>
        <text:list-item>
          <text:p text:style-name="P5">she jane. [He/She knows.] </text:p>
        </text:list-item>
        <text:list-item>
          <text:p text:style-name="P5">she bhat khay. [He/She eats rice.] </text:p>
        </text:list-item>
      </text:list>
      <text:h text:style-name="Heading_20_2" text:outline-level="2" text:is-list-header="true">3rd person plural subject</text:h>
      <text:p text:style-name="Body_20_Text_20__28_BnBridge_29_">she + ra = <text:span text:style-name="Emphasis">tara</text:span> [They]</text:p>
      <text:list text:style-name="L6">
        <text:list-item>
          <text:p text:style-name="P6">tara chatro. [They are students.] </text:p>
        </text:list-item>
        <text:list-item>
          <text:p text:style-name="P6">tara jane. [They know.] </text:p>
        </text:list-item>
        <text:list-item>
          <text:p text:style-name="P6">tara bhat khay. [They eat rice.] </text:p>
        </text:list-item>
      </text:list>
      <text:p text:style-name="P7"/>
      <text:h text:style-name="Heading_20_1" text:outline-level="1">Posssessive Determiner/Pronouns</text:h>
      <text:h text:style-name="Heading_20_2" text:outline-level="2">1st person singular possessive</text:h>
      <text:p text:style-name="Body_20_Text_20__28_BnBridge_29_">ami + r = <text:span text:style-name="Emphasis">amar</text:span> [My/Mine]</text:p>
      <text:list text:style-name="L7">
        <text:list-item>
          <text:p text:style-name="P8">amar boi [My book] </text:p>
        </text:list-item>
        <text:list-item>
          <text:p text:style-name="P8">boiṭi amar. [The book is mine.] </text:p>
        </text:list-item>
      </text:list>
      <text:h text:style-name="Heading_20_2" text:outline-level="2" text:is-list-header="true">1st person plural possessive</text:h>
      <text:p text:style-name="Body_20_Text_20__28_BnBridge_29_">ami + der = <text:span text:style-name="Emphasis">amader</text:span> [Our/Ours]</text:p>
      <text:list text:style-name="L8">
        <text:list-item>
          <text:p text:style-name="P9">amader skul. [Our school] </text:p>
        </text:list-item>
        <text:list-item>
          <text:p text:style-name="P9">baṛiṭi amader. [The house is ours.] </text:p>
        </text:list-item>
      </text:list>
      <text:h text:style-name="Heading_20_2" text:outline-level="2" text:is-list-header="true">2nd person singular possessive</text:h>
      <text:p text:style-name="Body_20_Text_20__28_BnBridge_29_">tumi + r = <text:span text:style-name="Emphasis">tomar</text:span> [Your/Yours]</text:p>
      <text:list text:style-name="L9">
        <text:list-item>
          <text:p text:style-name="P10">tomar boi. [Your book] </text:p>
        </text:list-item>
        <text:list-item>
          <text:p text:style-name="P10">boiṭi tomar. [The book is yours.] </text:p>
        </text:list-item>
      </text:list>
      <text:h text:style-name="P11" text:outline-level="2" text:is-list-header="true">2nd person plural possessive</text:h>
      <text:p text:style-name="Body_20_Text_20__28_BnBridge_29_">tumi + der = <text:span text:style-name="Emphasis">tomader</text:span> [Your/Yours]</text:p>
      <text:list text:style-name="L10">
        <text:list-item>
          <text:p text:style-name="P12"><text:soft-page-break/>tomader skul [Your school] </text:p>
        </text:list-item>
        <text:list-item>
          <text:p text:style-name="P12">baṛiṭi amader. [The house is yours.] </text:p>
        </text:list-item>
      </text:list>
      <text:h text:style-name="Heading_20_2" text:outline-level="2" text:is-list-header="true">3rd person singular possessive</text:h>
      <text:p text:style-name="Body_20_Text_20__28_BnBridge_29_">she + r = <text:span text:style-name="Emphasis">tar</text:span></text:p>
      <text:list text:style-name="L11">
        <text:list-item>
          <text:p text:style-name="P13">tar boi [His/Her book] </text:p>
        </text:list-item>
        <text:list-item>
          <text:p text:style-name="P13">boiṭi tar. [The book is his/hers.] </text:p>
        </text:list-item>
      </text:list>
      <text:h text:style-name="Heading_20_2" text:outline-level="2" text:is-list-header="true">3rd person plural possessive</text:h>
      <text:p text:style-name="Body_20_Text_20__28_BnBridge_29_">she + der = <text:span text:style-name="Emphasis">tader</text:span></text:p>
      <text:list text:style-name="L12">
        <text:list-item>
          <text:p text:style-name="P14">tader desh [Their country] </text:p>
        </text:list-item>
        <text:list-item>
          <text:p text:style-name="P14">gaṛiṭi tader. [The car is theirs.] </text:p>
        </text:list-item>
      </text:list>
      <text:p text:style-name="P7"/>
      <text:h text:style-name="Heading_20_1" text:outline-level="1">Objects</text:h>
      <text:p text:style-name="Body_20_Text_20__28_BnBridge_29_">objects end in /ke/ [Me]</text:p>
      <text:h text:style-name="Heading_20_2" text:outline-level="2">1st Person Singular Object</text:h>
      <text:p text:style-name="Body_20_Text_20__28_BnBridge_29_">ami + ke = <text:span text:style-name="Emphasis">amake</text:span> , amay</text:p>
      <text:list text:style-name="L13">
        <text:list-item>
          <text:p text:style-name="P15">she amake cene. [She knows me.] </text:p>
        </text:list-item>
      </text:list>
      <text:h text:style-name="Heading_20_2" text:outline-level="2" text:is-list-header="true">1st person Plural Object</text:h>
      <text:p text:style-name="Body_20_Text_20__28_BnBridge_29_">ami + der + ke = <text:span text:style-name="Emphasis">amaderke</text:span> [Us]</text:p>
      <text:list text:style-name="L14">
        <text:list-item>
          <text:p text:style-name="P16">she amaderke cene. [She knows us.] </text:p>
        </text:list-item>
      </text:list>
      <text:h text:style-name="Heading_20_2" text:outline-level="2" text:is-list-header="true">2nd Person Singular Object</text:h>
      <text:p text:style-name="Body_20_Text_20__28_BnBridge_29_">tumi + ke = <text:span text:style-name="Emphasis">tomake</text:span> , tomay</text:p>
      <text:list text:style-name="L15">
        <text:list-item>
          <text:p text:style-name="P17">ami tomake cini na. [I don't know you.] </text:p>
        </text:list-item>
      </text:list>
      <text:h text:style-name="Heading_20_2" text:outline-level="2" text:is-list-header="true">2nd Person Plural Object</text:h>
      <text:p text:style-name="Body_20_Text_20__28_BnBridge_29_">tumi + der + ke = <text:span text:style-name="Emphasis">tomaderke</text:span></text:p>
      <text:list text:style-name="L16">
        <text:list-item>
          <text:p text:style-name="P18">amra tomaderke cini na. [We don't know you all.] </text:p>
        </text:list-item>
      </text:list>
      <text:h text:style-name="Heading_20_2" text:outline-level="2" text:is-list-header="true"><text:soft-page-break/>3rd Person Singular Object</text:h>
      <text:p text:style-name="Body_20_Text_20__28_BnBridge_29_">she + ke = <text:span text:style-name="Emphasis">take</text:span> [Him/Her]</text:p>
      <text:list text:style-name="L17">
        <text:list-item>
          <text:p text:style-name="P19">ami take cini. [I know him.] </text:p>
        </text:list-item>
      </text:list>
      <text:h text:style-name="Heading_20_2" text:outline-level="2" text:is-list-header="true">3rd Person Plural Object</text:h>
      <text:p text:style-name="Body_20_Text_20__28_BnBridge_29_">she + der + ke = <text:span text:style-name="Emphasis">taderke</text:span> [Them]</text:p>
      <text:list text:style-name="L18">
        <text:list-item>
          <text:p text:style-name="P20">amra taderke cini na. [We don't know them.] </text:p>
        </text:list-item>
      </text:list>
      <text:p text:style-name="Body_20_Text_20__28_BnBridge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lear Sans" svg:font-family="'Clear Sans'" style:font-family-generic="swiss" style:font-pitch="variable"/>
    <style:font-face style:name="Franklin Gothic Book" svg:font-family="'Franklin Gothic Book'" style:font-family-generic="swiss" style:font-pitch="variable"/>
    <style:font-face style:name="Gentium Book Plus" svg:font-family="'Gentium Book Plus'" style:font-adornments="Regular" style:font-pitch="variable"/>
    <style:font-face style:name="July" svg:font-family="July"/>
    <style:font-face style:name="Lobster Two" svg:font-family="'Lobster Tw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/>
      <style:text-properties style:font-name="Berlin Sans FB Demi" fo:font-family="'Berlin Sans FB Demi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fo:color="#622502" loext:opacity="100%" style:font-name="Berlin Sans FB" fo:font-family="'Berlin Sans FB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ext_20_body">
      <style:text-properties fo:color="#2f4f4f" loext:opacity="100%" style:font-name="Franklin Gothic Book" fo:font-family="'Franklin Gothic Book'" style:font-family-generic="swiss" style:font-pitch="variable" fo:font-weight="bold" style:font-weight-asian="bold" style:font-weight-complex="bold"/>
    </style:style>
    <style:style style:name="Table_20_Content_20__28_diacrited_29_" style:display-name="Table Content (diacrited)" style:family="paragraph" style:parent-style-name="Text_20_body">
      <style:paragraph-properties fo:text-align="center" style:justify-single-word="false"/>
      <style:text-properties style:font-name="Clear Sans" fo:font-family="'Clear Sans'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2.47mm" fo:margin-bottom="2.12mm" style:contextual-spacing="false"/>
      <style:text-properties fo:color="#530260" loext:opacity="100%" style:font-name="Berlin Sans FB" fo:font-family="'Berlin Sans FB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te_20_Header" style:display-name="Note Header" style:family="paragraph" style:parent-style-name="Heading_20_4" style:default-outline-level="" style:list-style-name="">
      <style:text-properties fo:color="#43c330" loext:opacity="100%" style:font-name="Lobster Two" fo:font-family="'Lobster Two'" style:font-pitch="variabl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Body_20_Text_20__28_BnBridge_29_" style:display-name="Body Text (BnBridge)" style:family="paragraph" style:parent-style-name="Text_20_body">
      <style:text-properties style:font-name="Gentium Book Plus" fo:font-family="'Gentium Book Plus'" style:font-style-name="Regular" style:font-pitch="variable" fo:font-weight="500"/>
    </style:style>
    <style:style style:name="Note_20_Content" style:display-name="Note Content" style:family="paragraph" style:parent-style-name="Body_20_Text_20__28_BnBridge_29_">
      <loext:graphic-properties draw:fill="solid" draw:fill-color="#ccf4c6" draw:opacity="100%"/>
      <style:paragraph-properties fo:background-color="#ccf4c6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left" style:justify-single-word="false"/>
      <style:text-properties style:font-name="Lobster Two" fo:font-family="'Lobster Two'" style:font-pitch="variable"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6T18:30:27.240303843</meta:creation-date>
    <dc:date>2026-05-26T22:06:07.398040053</dc:date>
    <meta:editing-duration>PT1H15M56S</meta:editing-duration>
    <meta:editing-cycles>24</meta:editing-cycles>
    <meta:generator>LibreOffice/26.2.2.2$Linux_X86_64 LibreOffice_project/620$Build-2</meta:generator>
    <meta:document-statistic meta:table-count="0" meta:image-count="0" meta:object-count="0" meta:page-count="4" meta:paragraph-count="77" meta:word-count="428" meta:character-count="2213" meta:non-whitespace-character-count="1862"/>
  </office:meta>
</office:document-meta>
</file>