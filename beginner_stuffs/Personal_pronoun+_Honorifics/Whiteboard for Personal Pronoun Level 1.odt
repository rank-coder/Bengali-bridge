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erlin Sans FB" svg:font-family="'Berlin Sans FB'" style:font-family-generic="swiss"/>
    <style:font-face style:name="Berlin Sans FB Demi" svg:font-family="'Berlin Sans FB Demi'" style:font-family-generic="swiss"/>
    <style:font-face style:name="Clear Sans" svg:font-family="'Clear Sans'" style:font-family-generic="swiss"/>
    <style:font-face style:name="Franklin Gothic Book" svg:font-family="'Franklin Gothic Book'" style:font-family-generic="swiss"/>
    <style:font-face style:name="Gentium Book Plus" svg:font-family="'Gentium Book Plus'" style:font-family-generic="roman"/>
    <style:font-face style:name="July" svg:font-family="July" style:font-family-generic="roman"/>
    <style:font-face style:name="Lobster Two" svg:font-family="'Lobster Two'" style:font-family-generic="roman"/>
    <style:font-face style:name="Noto Sans CJK SC" svg:font-family="'Noto Sans CJK SC'" style:font-family-generic="roman"/>
    <style:font-face style:name="Noto Serif CJK SC" svg:font-family="'Noto Serif CJK SC'" style:font-family-generic="roman"/>
  </office:font-face-decls>
  <office:automatic-styles>
    <style:style style:name="P1" style:family="paragraph" style:parent-style-name="Title">
      <style:paragraph-properties fo:margin-top="4.23mm" fo:margin-bottom="2.12mm" style:contextual-spacing="false" fo:text-align="left" style:justify-single-word="false" style:writing-mode="lr-tb"/>
    </style:style>
    <style:style style:name="P2" style:family="paragraph" style:parent-style-name="Heading_20_1" style:list-style-name="WWNum1">
      <style:paragraph-properties fo:margin-left="0mm" fo:text-align="left" style:justify-single-word="false" fo:text-indent="0mm" style:auto-text-indent="false" style:writing-mode="lr-tb"/>
    </style:style>
    <style:style style:name="P3" style:family="paragraph" style:parent-style-name="Heading_20_2" style:list-style-name="WWNum1">
      <style:paragraph-properties fo:margin-left="0mm" fo:text-align="left" style:justify-single-word="false" fo:text-indent="0mm" style:auto-text-indent="false" style:writing-mode="lr-tb"/>
    </style:style>
    <style:style style:name="P4" style:family="paragraph" style:parent-style-name="Body_20_Text_20__28_BnBridge_29_" style:list-style-name="WWNum2">
      <style:paragraph-properties fo:margin-left="12.51mm" fo:text-align="left" style:justify-single-word="false" fo:text-indent="-4.99mm" style:auto-text-indent="false" style:writing-mode="lr-tb">
        <style:tab-stops>
          <style:tab-stop style:position="12.51mm"/>
        </style:tab-stops>
      </style:paragraph-properties>
    </style:style>
    <style:style style:name="P5" style:family="paragraph" style:parent-style-name="Body_20_Text_20__28_BnBridge_29_" style:list-style-name="">
      <style:paragraph-properties fo:margin-left="0mm" fo:text-align="left" style:justify-single-word="false" fo:text-indent="0mm" style:auto-text-indent="false" style:writing-mode="lr-tb"/>
    </style:style>
    <style:style style:name="P6" style:family="paragraph" style:parent-style-name="Heading_20_2" style:list-style-name="">
      <style:paragraph-properties fo:margin-left="0mm" fo:text-align="left" style:justify-single-word="false" fo:text-indent="0mm" style:auto-text-indent="false" style:writing-mode="lr-tb"/>
    </style:style>
    <style:style style:name="P7" style:family="paragraph" style:parent-style-name="Body_20_Text_20__28_BnBridge_29_">
      <style:paragraph-properties fo:text-align="left" style:justify-single-word="false" style:writing-mode="lr-tb"/>
    </style:style>
    <style:style style:name="P8" style:family="paragraph" style:parent-style-name="Body_20_Text_20__28_BnBridge_29_" style:list-style-name="WWNum3">
      <style:paragraph-properties fo:margin-left="12.51mm" fo:text-align="left" style:justify-single-word="false" fo:text-indent="-4.99mm" style:auto-text-indent="false" style:writing-mode="lr-tb">
        <style:tab-stops>
          <style:tab-stop style:position="12.51mm"/>
        </style:tab-stops>
      </style:paragraph-properties>
    </style:style>
    <style:style style:name="P9" style:family="paragraph" style:parent-style-name="Body_20_Text_20__28_BnBridge_29_" style:list-style-name="WWNum4">
      <style:paragraph-properties fo:margin-left="12.51mm" fo:text-align="left" style:justify-single-word="false" fo:text-indent="-4.99mm" style:auto-text-indent="false" style:writing-mode="lr-tb">
        <style:tab-stops>
          <style:tab-stop style:position="12.51mm"/>
        </style:tab-stops>
      </style:paragraph-properties>
    </style:style>
    <style:style style:name="P10" style:family="paragraph" style:parent-style-name="Body_20_Text_20__28_BnBridge_29_" style:list-style-name="WWNum5">
      <style:paragraph-properties fo:margin-left="12.51mm" fo:text-align="left" style:justify-single-word="false" fo:text-indent="-4.99mm" style:auto-text-indent="false" style:writing-mode="lr-tb">
        <style:tab-stops>
          <style:tab-stop style:position="12.51mm"/>
        </style:tab-stops>
      </style:paragraph-properties>
    </style:style>
    <style:style style:name="P11" style:family="paragraph" style:parent-style-name="Body_20_Text_20__28_BnBridge_29_" style:list-style-name="WWNum6">
      <style:paragraph-properties fo:margin-left="12.51mm" fo:text-align="left" style:justify-single-word="false" fo:text-indent="-4.99mm" style:auto-text-indent="false" style:writing-mode="lr-tb">
        <style:tab-stops>
          <style:tab-stop style:position="12.51mm"/>
        </style:tab-stops>
      </style:paragraph-properties>
    </style:style>
    <style:style style:name="P12" style:family="paragraph" style:parent-style-name="Body_20_Text_20__28_BnBridge_29_" style:list-style-name="WWNum7">
      <style:paragraph-properties fo:margin-left="12.51mm" fo:text-align="left" style:justify-single-word="false" fo:text-indent="-4.99mm" style:auto-text-indent="false" style:writing-mode="lr-tb">
        <style:tab-stops>
          <style:tab-stop style:position="12.51mm"/>
        </style:tab-stops>
      </style:paragraph-properties>
    </style:style>
    <style:style style:name="P13" style:family="paragraph" style:parent-style-name="Horizontal_20_Line">
      <style:paragraph-properties fo:margin-top="0mm" fo:margin-bottom="2.47mm" style:contextual-spacing="false" fo:line-height="115%" fo:text-align="left" style:justify-single-word="false" style:writing-mode="lr-tb"/>
    </style:style>
    <style:style style:name="P14" style:family="paragraph" style:parent-style-name="Body_20_Text_20__28_BnBridge_29_" style:list-style-name="WWNum8">
      <style:paragraph-properties fo:margin-left="12.51mm" fo:text-align="left" style:justify-single-word="false" fo:text-indent="-4.99mm" style:auto-text-indent="false" style:writing-mode="lr-tb">
        <style:tab-stops>
          <style:tab-stop style:position="12.51mm"/>
        </style:tab-stops>
      </style:paragraph-properties>
    </style:style>
    <style:style style:name="P15" style:family="paragraph" style:parent-style-name="Body_20_Text_20__28_BnBridge_29_" style:list-style-name="WWNum9">
      <style:paragraph-properties fo:margin-left="12.51mm" fo:text-align="left" style:justify-single-word="false" fo:text-indent="-4.99mm" style:auto-text-indent="false" style:writing-mode="lr-tb">
        <style:tab-stops>
          <style:tab-stop style:position="12.51mm"/>
        </style:tab-stops>
      </style:paragraph-properties>
    </style:style>
    <style:style style:name="P16" style:family="paragraph" style:parent-style-name="Body_20_Text_20__28_BnBridge_29_" style:list-style-name="WWNum10">
      <style:paragraph-properties fo:margin-left="12.51mm" fo:text-align="left" style:justify-single-word="false" fo:text-indent="-4.99mm" style:auto-text-indent="false" style:writing-mode="lr-tb">
        <style:tab-stops>
          <style:tab-stop style:position="12.51mm"/>
        </style:tab-stops>
      </style:paragraph-properties>
    </style:style>
    <style:style style:name="P17" style:family="paragraph" style:parent-style-name="Heading_20_2" style:list-style-name="">
      <style:paragraph-properties fo:margin-left="0mm" fo:margin-top="0mm" fo:margin-bottom="2.47mm" style:contextual-spacing="false" fo:line-height="115%" fo:text-align="left" style:justify-single-word="false" fo:text-indent="0mm" style:auto-text-indent="false" style:writing-mode="lr-tb"/>
    </style:style>
    <style:style style:name="P18" style:family="paragraph" style:parent-style-name="Body_20_Text_20__28_BnBridge_29_" style:list-style-name="WWNum11">
      <style:paragraph-properties fo:margin-left="12.51mm" fo:text-align="left" style:justify-single-word="false" fo:text-indent="-4.99mm" style:auto-text-indent="false" style:writing-mode="lr-tb">
        <style:tab-stops>
          <style:tab-stop style:position="12.51mm"/>
        </style:tab-stops>
      </style:paragraph-properties>
    </style:style>
    <style:style style:name="P19" style:family="paragraph" style:parent-style-name="Body_20_Text_20__28_BnBridge_29_" style:list-style-name="WWNum12">
      <style:paragraph-properties fo:margin-left="12.51mm" fo:text-align="left" style:justify-single-word="false" fo:text-indent="-4.99mm" style:auto-text-indent="false" style:writing-mode="lr-tb">
        <style:tab-stops>
          <style:tab-stop style:position="12.51mm"/>
        </style:tab-stops>
      </style:paragraph-properties>
    </style:style>
    <style:style style:name="P20" style:family="paragraph" style:parent-style-name="Body_20_Text_20__28_BnBridge_29_" style:list-style-name="WWNum13">
      <style:paragraph-properties fo:margin-left="12.51mm" fo:text-align="left" style:justify-single-word="false" fo:text-indent="-4.99mm" style:auto-text-indent="false" style:writing-mode="lr-tb">
        <style:tab-stops>
          <style:tab-stop style:position="12.51mm"/>
        </style:tab-stops>
      </style:paragraph-properties>
    </style:style>
    <style:style style:name="P21" style:family="paragraph" style:parent-style-name="Body_20_Text_20__28_BnBridge_29_" style:list-style-name="WWNum14">
      <style:paragraph-properties fo:margin-left="12.51mm" fo:text-align="left" style:justify-single-word="false" fo:text-indent="-4.99mm" style:auto-text-indent="false" style:writing-mode="lr-tb">
        <style:tab-stops>
          <style:tab-stop style:position="12.51mm"/>
        </style:tab-stops>
      </style:paragraph-properties>
    </style:style>
    <style:style style:name="P22" style:family="paragraph" style:parent-style-name="Body_20_Text_20__28_BnBridge_29_" style:list-style-name="WWNum15">
      <style:paragraph-properties fo:margin-left="12.51mm" fo:text-align="left" style:justify-single-word="false" fo:text-indent="-4.99mm" style:auto-text-indent="false" style:writing-mode="lr-tb">
        <style:tab-stops>
          <style:tab-stop style:position="12.51mm"/>
        </style:tab-stops>
      </style:paragraph-properties>
    </style:style>
    <style:style style:name="P23" style:family="paragraph" style:parent-style-name="Body_20_Text_20__28_BnBridge_29_" style:list-style-name="WWNum16">
      <style:paragraph-properties fo:margin-left="12.51mm" fo:text-align="left" style:justify-single-word="false" fo:text-indent="-4.99mm" style:auto-text-indent="false" style:writing-mode="lr-tb">
        <style:tab-stops>
          <style:tab-stop style:position="12.51mm"/>
        </style:tab-stops>
      </style:paragraph-properties>
    </style:style>
    <style:style style:name="P24" style:family="paragraph" style:parent-style-name="Body_20_Text_20__28_BnBridge_29_" style:list-style-name="WWNum17">
      <style:paragraph-properties fo:margin-left="12.51mm" fo:text-align="left" style:justify-single-word="false" fo:text-indent="-4.99mm" style:auto-text-indent="false" style:writing-mode="lr-tb">
        <style:tab-stops>
          <style:tab-stop style:position="12.51mm"/>
        </style:tab-stops>
      </style:paragraph-properties>
    </style:style>
    <style:style style:name="P25" style:family="paragraph" style:parent-style-name="Body_20_Text_20__28_BnBridge_29_" style:list-style-name="WWNum18">
      <style:paragraph-properties fo:margin-left="12.51mm" fo:text-align="left" style:justify-single-word="false" fo:text-indent="-4.99mm" style:auto-text-indent="false" style:writing-mode="lr-tb">
        <style:tab-stops>
          <style:tab-stop style:position="12.51mm"/>
        </style:tab-stops>
      </style:paragraph-properties>
    </style:style>
    <style:style style:name="P26" style:family="paragraph" style:parent-style-name="Body_20_Text_20__28_BnBridge_29_" style:list-style-name="WWNum19">
      <style:paragraph-properties fo:margin-left="12.51mm" fo:text-align="left" style:justify-single-word="false" fo:text-indent="-4.99mm" style:auto-text-indent="false" style:writing-mode="lr-tb">
        <style:tab-stops>
          <style:tab-stop style:position="12.51mm"/>
        </style:tab-stops>
      </style:paragraph-properties>
    </style:style>
    <style:style style:name="P27" style:family="paragraph" style:parent-style-name="Body_20_Text_20__28_BnBridge_29_">
      <style:paragraph-properties fo:margin-top="0mm" fo:margin-bottom="2.47mm" style:contextual-spacing="false" fo:text-align="left" style:justify-single-word="fals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iteboard for Personal Pronoun Level 1</text:p>
      <text:list xml:id="list3436146906" text:style-name="WWNum1">
        <text:list-item>
          <text:h text:style-name="P2" text:outline-level="1">Subject Pronouns</text:h>
          <text:list>
            <text:list-item>
              <text:h text:style-name="P3" text:outline-level="2">1st person singular subject</text:h>
            </text:list-item>
          </text:list>
        </text:list-item>
      </text:list>
      <text:list text:style-name="WWNum2">
        <text:list-item>
          <text:p text:style-name="P4">ami onupöm. [I am Onupom.] </text:p>
        </text:list-item>
        <text:list-item>
          <text:p text:style-name="P4">ami jani. [I know.] </text:p>
        </text:list-item>
      </text:list>
      <text:p text:style-name="P5">S + O + V (Default Sentence Structure)</text:p>
      <text:list text:continue-numbering="true" text:style-name="WWNum2">
        <text:list-item>
          <text:p text:style-name="P4">ami bhat khai. [I eat rice.] </text:p>
        </text:list-item>
      </text:list>
      <text:h text:style-name="P6" text:outline-level="2">1st person plural subject</text:h>
      <text:p text:style-name="P7">ami + ra = <text:span text:style-name="Emphasis">amra</text:span></text:p>
      <text:list text:style-name="WWNum3">
        <text:list-item>
          <text:p text:style-name="P8">amra chattro. [We are students.] </text:p>
        </text:list-item>
        <text:list-item>
          <text:p text:style-name="P8">amra jani. [We know] </text:p>
        </text:list-item>
        <text:list-item>
          <text:p text:style-name="P8">amra bhat khai. [We eat rice.] </text:p>
        </text:list-item>
      </text:list>
      <text:h text:style-name="P6" text:outline-level="2">2nd person singular subject</text:h>
      <text:p text:style-name="P7"><text:span text:style-name="Emphasis">tumi</text:span></text:p>
      <text:list text:style-name="WWNum4">
        <text:list-item>
          <text:p text:style-name="P9">tumi rana. [You are Rana.] </text:p>
        </text:list-item>
        <text:list-item>
          <text:p text:style-name="P9">tumi jano. [You know.] </text:p>
        </text:list-item>
        <text:list-item>
          <text:p text:style-name="P9">tumi bhat khao. [You eat rice.] </text:p>
        </text:list-item>
      </text:list>
      <text:h text:style-name="P6" text:outline-level="2">2nd person plural subject</text:h>
      <text:p text:style-name="P7">tumi + ra = <text:span text:style-name="Emphasis">tomra</text:span></text:p>
      <text:list text:style-name="WWNum5">
        <text:list-item>
          <text:p text:style-name="P10">tomra chatro. [You are students.]<text:line-break/>We don't need plural nouns. </text:p>
        </text:list-item>
        <text:list-item>
          <text:p text:style-name="P10">tomra jano. [You all know.] </text:p>
        </text:list-item>
        <text:list-item>
          <text:p text:style-name="P10">tomra bhat khao. [You all eat rice.] </text:p>
        </text:list-item>
      </text:list>
      <text:h text:style-name="P6" text:outline-level="2">3rd person singular subject</text:h>
      <text:p text:style-name="P7"><text:span text:style-name="Emphasis">she</text:span> [He/She]</text:p>
      <text:list text:style-name="WWNum6">
        <text:list-item>
          <text:p text:style-name="P11">she Rana. [He is Rana.] </text:p>
        </text:list-item>
        <text:list-item>
          <text:p text:style-name="P11"><text:soft-page-break/>she jane. [He/She knows.] </text:p>
        </text:list-item>
        <text:list-item>
          <text:p text:style-name="P11">she bhat khay. [He/She eats rice.] </text:p>
        </text:list-item>
      </text:list>
      <text:h text:style-name="P6" text:outline-level="2">3rd person plural subject</text:h>
      <text:p text:style-name="P7">she + ra = <text:span text:style-name="Emphasis">tara</text:span> [They]</text:p>
      <text:list text:style-name="WWNum7">
        <text:list-item>
          <text:p text:style-name="P12">tara chatro. [They are students.] </text:p>
        </text:list-item>
        <text:list-item>
          <text:p text:style-name="P12">tara jane. [They know.] </text:p>
        </text:list-item>
        <text:list-item>
          <text:p text:style-name="P12">tara bhat khay. [They eat rice.] </text:p>
        </text:list-item>
      </text:list>
      <text:p text:style-name="P13"/>
      <text:list xml:id="list131733799557239" text:continue-list="list3436146906" text:style-name="WWNum1">
        <text:list-item>
          <text:h text:style-name="P2" text:outline-level="1">Posssessive Determiner/Pronouns</text:h>
          <text:list>
            <text:list-item>
              <text:h text:style-name="P3" text:outline-level="2">1st person singular possessive</text:h>
            </text:list-item>
          </text:list>
        </text:list-item>
      </text:list>
      <text:p text:style-name="P7">ami + r = <text:span text:style-name="Emphasis">amar</text:span> [My/Mine]</text:p>
      <text:list text:style-name="WWNum8">
        <text:list-item>
          <text:p text:style-name="P14">amar boi [My book] </text:p>
        </text:list-item>
        <text:list-item>
          <text:p text:style-name="P14">boiṭi amar. [The book is mine.] </text:p>
        </text:list-item>
      </text:list>
      <text:h text:style-name="P6" text:outline-level="2">1st person plural possessive</text:h>
      <text:p text:style-name="P7">ami + der = <text:span text:style-name="Emphasis">amader</text:span> [Our/Ours]</text:p>
      <text:list text:style-name="WWNum9">
        <text:list-item>
          <text:p text:style-name="P15">amader skul. [Our school] </text:p>
        </text:list-item>
        <text:list-item>
          <text:p text:style-name="P15">baṛiṭi amader. [The house is ours.] </text:p>
        </text:list-item>
      </text:list>
      <text:h text:style-name="P6" text:outline-level="2">2nd person singular possessive</text:h>
      <text:p text:style-name="P7">tumi + r = <text:span text:style-name="Emphasis">tomar</text:span> [Your/Yours]</text:p>
      <text:list text:style-name="WWNum10">
        <text:list-item>
          <text:p text:style-name="P16">tomar boi. [Your book] </text:p>
        </text:list-item>
        <text:list-item>
          <text:p text:style-name="P16">boiṭi tomar. [The book is yours.] </text:p>
        </text:list-item>
      </text:list>
      <text:h text:style-name="P17" text:outline-level="2">2nd person plural possessive</text:h>
      <text:p text:style-name="P7">tumi + der = <text:span text:style-name="Emphasis">tomader</text:span> [Your/Yours]</text:p>
      <text:list text:style-name="WWNum11">
        <text:list-item>
          <text:p text:style-name="P18">tomader skul [Your school] </text:p>
        </text:list-item>
        <text:list-item>
          <text:p text:style-name="P18">baṛiṭi amader. [The house is yours.] </text:p>
        </text:list-item>
      </text:list>
      <text:h text:style-name="P6" text:outline-level="2">3rd person singular possessive</text:h>
      <text:p text:style-name="P7">she + r = <text:span text:style-name="Emphasis">tar</text:span></text:p>
      <text:list text:style-name="WWNum12">
        <text:list-item>
          <text:p text:style-name="P19"><text:soft-page-break/>tar boi [His/Her book] </text:p>
        </text:list-item>
        <text:list-item>
          <text:p text:style-name="P19">boiṭi tar. [The book is his/hers.] </text:p>
        </text:list-item>
      </text:list>
      <text:h text:style-name="P6" text:outline-level="2">3rd person plural possessive</text:h>
      <text:p text:style-name="P7">she + der = <text:span text:style-name="Emphasis">tader</text:span></text:p>
      <text:list text:style-name="WWNum13">
        <text:list-item>
          <text:p text:style-name="P20">tader desh [Their country] </text:p>
        </text:list-item>
        <text:list-item>
          <text:p text:style-name="P20">gaṛiṭi tader. [The car is theirs.] </text:p>
        </text:list-item>
      </text:list>
      <text:p text:style-name="P13"/>
      <text:list text:continue-list="list131733799557239" text:style-name="WWNum1">
        <text:list-item>
          <text:h text:style-name="P2" text:outline-level="1">Objects</text:h>
        </text:list-item>
      </text:list>
      <text:p text:style-name="P7">objects end in /ke/ [Me]</text:p>
      <text:list text:continue-numbering="true" text:style-name="WWNum1">
        <text:list-item>
          <text:list>
            <text:list-item>
              <text:h text:style-name="P3" text:outline-level="2">1st Person Singular Object</text:h>
            </text:list-item>
          </text:list>
        </text:list-item>
      </text:list>
      <text:p text:style-name="P7">ami + ke = <text:span text:style-name="Emphasis">amake</text:span> , amay</text:p>
      <text:list text:style-name="WWNum14">
        <text:list-item>
          <text:p text:style-name="P21">she amake cene. [She knows me.] </text:p>
        </text:list-item>
      </text:list>
      <text:h text:style-name="P6" text:outline-level="2">1st person Plural Object</text:h>
      <text:p text:style-name="P7">ami + der + ke = <text:span text:style-name="Emphasis">amaderke</text:span> [Us]</text:p>
      <text:list text:style-name="WWNum15">
        <text:list-item>
          <text:p text:style-name="P22">she amaderke cene. [She knows us.] </text:p>
        </text:list-item>
      </text:list>
      <text:h text:style-name="P6" text:outline-level="2">2nd Person Singular Object</text:h>
      <text:p text:style-name="P7">tumi + ke = <text:span text:style-name="Emphasis">tomake</text:span> , tomay</text:p>
      <text:list text:style-name="WWNum16">
        <text:list-item>
          <text:p text:style-name="P23">ami tomake cini na. [I don't know you.] </text:p>
        </text:list-item>
      </text:list>
      <text:h text:style-name="P6" text:outline-level="2">2nd Person Plural Object</text:h>
      <text:p text:style-name="P7">tumi + der + ke = <text:span text:style-name="Emphasis">tomaderke</text:span></text:p>
      <text:list text:style-name="WWNum17">
        <text:list-item>
          <text:p text:style-name="P24">amra tomaderke cini na. [We don't know you all.] </text:p>
        </text:list-item>
      </text:list>
      <text:h text:style-name="P6" text:outline-level="2">3rd Person Singular Object</text:h>
      <text:p text:style-name="P7">she + ke = <text:span text:style-name="Emphasis">take</text:span> [Him/Her]</text:p>
      <text:list text:style-name="WWNum18">
        <text:list-item>
          <text:p text:style-name="P25">ami take cini. [I know him.] </text:p>
        </text:list-item>
      </text:list>
      <text:h text:style-name="P6" text:outline-level="2">3rd Person Plural Object</text:h>
      <text:p text:style-name="P7">she + der + ke = <text:span text:style-name="Emphasis">taderke</text:span> [Them]</text:p>
      <text:list text:style-name="WWNum19">
        <text:list-item>
          <text:p text:style-name="P26">amra taderke cini na. [We don't know them.] </text:p>
        </text:list-item>
      </text:list>
      <text:p text:style-name="P27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erlin Sans FB" svg:font-family="'Berlin Sans FB'" style:font-family-generic="swiss"/>
    <style:font-face style:name="Berlin Sans FB Demi" svg:font-family="'Berlin Sans FB Demi'" style:font-family-generic="swiss"/>
    <style:font-face style:name="Clear Sans" svg:font-family="'Clear Sans'" style:font-family-generic="swiss"/>
    <style:font-face style:name="Franklin Gothic Book" svg:font-family="'Franklin Gothic Book'" style:font-family-generic="swiss"/>
    <style:font-face style:name="Gentium Book Plus" svg:font-family="'Gentium Book Plus'" style:font-family-generic="roman"/>
    <style:font-face style:name="July" svg:font-family="July" style:font-family-generic="roman"/>
    <style:font-face style:name="Lobster Two" svg:font-family="'Lobster Two'" style:font-family-generic="roman"/>
    <style:font-face style:name="Noto Sans CJK SC" svg:font-family="'Noto Sans CJK SC'" style:font-family-generic="roman"/>
    <style:font-face style:name="Noto Serif CJK SC" svg:font-family="'Noto Serif CJK SC'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July" fo:font-size="12pt" fo:language="en" fo:country="GB" style:letter-kerning="true" style:font-name-asian="Noto Serif CJK SC" style:font-size-asian="12pt" style:language-asian="zh" style:country-asian="CN" style:font-name-complex="July" style:font-size-complex="12pt" style:language-complex="bn" style:country-complex="BD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July" fo:font-size="12pt" fo:language="en" fo:country="GB" style:letter-kerning="true" style:font-name-asian="Noto Serif CJK SC" style:font-size-asian="12pt" style:language-asian="zh" style:country-asian="CN" style:font-name-complex="July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left" style:justify-single-word="false" fo:orphans="2" fo:widows="2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July" fo:font-family="July" style:font-family-generic="roman" fo:font-size="12pt" fo:language="en" fo:country="GB" style:letter-kerning="true" style:font-name-asian="Noto Serif CJK SC" style:font-family-asian="'Noto Serif CJK SC'" style:font-family-generic-asian="roman" style:font-size-asian="12pt" style:language-asian="zh" style:country-asian="CN" style:font-name-complex="July" style:font-family-complex="July" style:font-family-generic-complex="roman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July" fo:font-family="July" style:font-family-generic="roman" fo:font-size="14pt" style:font-name-asian="Noto Sans CJK SC" style:font-family-asian="'Noto Sans CJK SC'" style:font-family-generic-asian="roman" style:font-size-asian="14pt" style:font-name-complex="July" style:font-family-complex="July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July" fo:font-family="July" style:font-family-generic="roman" style:font-name-complex="July" style:font-family-complex="July" style:font-family-generic-complex="roman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July" fo:font-family="July" style:font-family-generic="roman" fo:font-size="12pt" fo:font-style="italic" style:font-size-asian="12pt" style:font-style-asian="italic" style:font-name-complex="July" style:font-family-complex="July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July" fo:font-family="July" style:font-family-generic="roman" style:font-name-complex="July" style:font-family-complex="July" style:font-family-generic-complex="roman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chapter">
      <style:paragraph-properties fo:margin-top="4.23mm" fo:margin-bottom="2.12mm" style:contextual-spacing="false"/>
      <style:text-properties style:font-name="Berlin Sans FB Demi" fo:font-family="'Berlin Sans FB Demi'" style:font-family-generic="swiss" fo:font-size="18pt" fo:font-weight="normal" style:font-size-asian="18pt" style:font-weight-asian="normal" style:font-size-complex="18pt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chapter">
      <style:paragraph-properties fo:margin-top="3.53mm" fo:margin-bottom="2.12mm" style:contextual-spacing="false"/>
      <style:text-properties fo:color="#622502" loext:opacity="100%" style:font-name="Berlin Sans FB" fo:font-family="'Berlin Sans FB'" style:font-family-generic="swiss"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chapter">
      <style:paragraph-properties fo:margin-top="2.47mm" fo:margin-bottom="2.12mm" style:contextual-spacing="false"/>
      <style:text-properties fo:color="#530260" loext:opacity="100%" style:font-name="Berlin Sans FB" fo:font-family="'Berlin Sans FB'" style:font-family-generic="swiss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WWNum1" style:list-level="4" style:class="chapter">
      <style:paragraph-properties fo:margin-top="2.12mm" fo:margin-bottom="2.12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Text_20_body">
      <style:text-properties fo:color="#2f4f4f" loext:opacity="100%" style:font-name="Franklin Gothic Book" fo:font-family="'Franklin Gothic Book'" style:font-family-generic="swiss" fo:font-weight="bold" style:font-weight-asian="bold" style:font-weight-complex="bold"/>
    </style:style>
    <style:style style:name="Table_20_Content_20__28_diacrited_29_" style:display-name="Table Content (diacrited)" style:family="paragraph" style:parent-style-name="Text_20_body">
      <style:paragraph-properties fo:text-align="center" style:justify-single-word="false"/>
      <style:text-properties style:font-name="Clear Sans" fo:font-family="'Clear Sans'" style:font-family-generic="swiss"/>
    </style:style>
    <style:style style:name="Note_20_Header" style:display-name="Note Header" style:family="paragraph" style:parent-style-name="Heading_20_4" style:default-outline-level="" style:list-style-name="">
      <style:text-properties fo:color="#43c330" loext:opacity="100%" style:font-name="Lobster Two" fo:font-family="'Lobster Two'" style:font-family-generic="roman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Body_20_Text_20__28_BnBridge_29_" style:display-name="Body Text (BnBridge)" style:family="paragraph" style:parent-style-name="Text_20_body">
      <style:text-properties style:font-name="Gentium Book Plus" fo:font-family="'Gentium Book Plus'" style:font-family-generic="roman" fo:font-weight="normal" style:font-weight-asian="normal"/>
    </style:style>
    <style:style style:name="Note_20_Content" style:display-name="Note Content" style:family="paragraph" style:parent-style-name="Body_20_Text_20__28_BnBridge_29_">
      <loext:graphic-properties draw:fill="solid" draw:fill-color="#ccf4c6"/>
      <style:paragraph-properties fo:background-color="#ccf4c6"/>
    </style:style>
    <style:style style:name="Block_20_Quotation" style:display-name="Block Quotation" style:family="paragraph" style:parent-style-name="Standard">
      <style:paragraph-properties fo:margin-left="10mm" fo:margin-right="10mm" fo:margin-top="0mm" fo:margin-bottom="4.99mm" style:contextual-spacing="false" fo:text-indent="0m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9mm 0.09mm 0.09mm" fo:padding="0m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left" style:justify-single-word="false"/>
      <style:text-properties style:font-name="Lobster Two" fo:font-family="'Lobster Two'" style:font-family-generic="roman"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2.51mm" fo:text-indent="-4.99mm" fo:margin-left="12.51m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5.01mm" fo:text-indent="-4.99mm" fo:margin-left="25.01m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7.52mm" fo:text-indent="-4.99mm" fo:margin-left="37.52m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0.02mm" fo:text-indent="-4.99mm" fo:margin-left="50.02m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2.53mm" fo:text-indent="-4.99mm" fo:margin-left="62.53m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5.04mm" fo:text-indent="-4.99mm" fo:margin-left="75.04m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7.54mm" fo:text-indent="-4.99mm" fo:margin-left="87.54m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0.05mm" fo:text-indent="-4.99mm" fo:margin-left="100.05m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2.55mm" fo:text-indent="-4.99mm" fo:margin-left="112.5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2.51mm" fo:text-indent="-4.99mm" fo:margin-left="12.51m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5.01mm" fo:text-indent="-4.99mm" fo:margin-left="25.01m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7.52mm" fo:text-indent="-4.99mm" fo:margin-left="37.52m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0.02mm" fo:text-indent="-4.99mm" fo:margin-left="50.02m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2.53mm" fo:text-indent="-4.99mm" fo:margin-left="62.53m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5.04mm" fo:text-indent="-4.99mm" fo:margin-left="75.04m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7.54mm" fo:text-indent="-4.99mm" fo:margin-left="87.54m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0.05mm" fo:text-indent="-4.99mm" fo:margin-left="100.05m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2.55mm" fo:text-indent="-4.99mm" fo:margin-left="112.5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2.51mm" fo:text-indent="-4.99mm" fo:margin-left="12.51m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5.01mm" fo:text-indent="-4.99mm" fo:margin-left="25.01m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7.52mm" fo:text-indent="-4.99mm" fo:margin-left="37.52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0.02mm" fo:text-indent="-4.99mm" fo:margin-left="50.02m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2.53mm" fo:text-indent="-4.99mm" fo:margin-left="62.53m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5.04mm" fo:text-indent="-4.99mm" fo:margin-left="75.04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7.54mm" fo:text-indent="-4.99mm" fo:margin-left="87.54m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0.05mm" fo:text-indent="-4.99mm" fo:margin-left="100.05m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2.55mm" fo:text-indent="-4.99mm" fo:margin-left="112.5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2.51mm" fo:text-indent="-4.99mm" fo:margin-left="12.51m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5.01mm" fo:text-indent="-4.99mm" fo:margin-left="25.01m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7.52mm" fo:text-indent="-4.99mm" fo:margin-left="37.52m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0.02mm" fo:text-indent="-4.99mm" fo:margin-left="50.02m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2.53mm" fo:text-indent="-4.99mm" fo:margin-left="62.53m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5.04mm" fo:text-indent="-4.99mm" fo:margin-left="75.04m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7.54mm" fo:text-indent="-4.99mm" fo:margin-left="87.54m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0.05mm" fo:text-indent="-4.99mm" fo:margin-left="100.05m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2.55mm" fo:text-indent="-4.99mm" fo:margin-left="112.5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2.51mm" fo:text-indent="-4.99mm" fo:margin-left="12.51m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5.01mm" fo:text-indent="-4.99mm" fo:margin-left="25.01m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7.52mm" fo:text-indent="-4.99mm" fo:margin-left="37.52m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0.02mm" fo:text-indent="-4.99mm" fo:margin-left="50.02m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2.53mm" fo:text-indent="-4.99mm" fo:margin-left="62.53m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5.04mm" fo:text-indent="-4.99mm" fo:margin-left="75.04m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7.54mm" fo:text-indent="-4.99mm" fo:margin-left="87.54m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0.05mm" fo:text-indent="-4.99mm" fo:margin-left="100.05m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2.55mm" fo:text-indent="-4.99mm" fo:margin-left="112.5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2.51mm" fo:text-indent="-4.99mm" fo:margin-left="12.51m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5.01mm" fo:text-indent="-4.99mm" fo:margin-left="25.01m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7.52mm" fo:text-indent="-4.99mm" fo:margin-left="37.52m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0.02mm" fo:text-indent="-4.99mm" fo:margin-left="50.02m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2.53mm" fo:text-indent="-4.99mm" fo:margin-left="62.53m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5.04mm" fo:text-indent="-4.99mm" fo:margin-left="75.04m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7.54mm" fo:text-indent="-4.99mm" fo:margin-left="87.54m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0.05mm" fo:text-indent="-4.99mm" fo:margin-left="100.05m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2.55mm" fo:text-indent="-4.99mm" fo:margin-left="112.5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2.51mm" fo:text-indent="-4.99mm" fo:margin-left="12.51m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5.01mm" fo:text-indent="-4.99mm" fo:margin-left="25.01m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7.52mm" fo:text-indent="-4.99mm" fo:margin-left="37.52m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0.02mm" fo:text-indent="-4.99mm" fo:margin-left="50.02m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2.53mm" fo:text-indent="-4.99mm" fo:margin-left="62.53m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5.04mm" fo:text-indent="-4.99mm" fo:margin-left="75.04m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7.54mm" fo:text-indent="-4.99mm" fo:margin-left="87.54m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0.05mm" fo:text-indent="-4.99mm" fo:margin-left="100.05m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2.55mm" fo:text-indent="-4.99mm" fo:margin-left="112.5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2.51mm" fo:text-indent="-4.99mm" fo:margin-left="12.51m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5.01mm" fo:text-indent="-4.99mm" fo:margin-left="25.01m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7.52mm" fo:text-indent="-4.99mm" fo:margin-left="37.52m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0.02mm" fo:text-indent="-4.99mm" fo:margin-left="50.02m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2.53mm" fo:text-indent="-4.99mm" fo:margin-left="62.53m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5.04mm" fo:text-indent="-4.99mm" fo:margin-left="75.04m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7.54mm" fo:text-indent="-4.99mm" fo:margin-left="87.54m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0.05mm" fo:text-indent="-4.99mm" fo:margin-left="100.05m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2.55mm" fo:text-indent="-4.99mm" fo:margin-left="112.5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2.51mm" fo:text-indent="-4.99mm" fo:margin-left="12.51m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5.01mm" fo:text-indent="-4.99mm" fo:margin-left="25.01m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7.52mm" fo:text-indent="-4.99mm" fo:margin-left="37.52m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0.02mm" fo:text-indent="-4.99mm" fo:margin-left="50.02m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2.53mm" fo:text-indent="-4.99mm" fo:margin-left="62.53m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5.04mm" fo:text-indent="-4.99mm" fo:margin-left="75.04m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7.54mm" fo:text-indent="-4.99mm" fo:margin-left="87.54m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0.05mm" fo:text-indent="-4.99mm" fo:margin-left="100.05m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2.55mm" fo:text-indent="-4.99mm" fo:margin-left="112.5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51mm" fo:text-indent="-4.99mm" fo:margin-left="12.51m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5.01mm" fo:text-indent="-4.99mm" fo:margin-left="25.01m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7.52mm" fo:text-indent="-4.99mm" fo:margin-left="37.52m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0.02mm" fo:text-indent="-4.99mm" fo:margin-left="50.02m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2.53mm" fo:text-indent="-4.99mm" fo:margin-left="62.53m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5.04mm" fo:text-indent="-4.99mm" fo:margin-left="75.04m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7.54mm" fo:text-indent="-4.99mm" fo:margin-left="87.54m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0.05mm" fo:text-indent="-4.99mm" fo:margin-left="100.05m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2.55mm" fo:text-indent="-4.99mm" fo:margin-left="112.5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2.51mm" fo:text-indent="-4.99mm" fo:margin-left="12.51m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5.01mm" fo:text-indent="-4.99mm" fo:margin-left="25.01m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7.52mm" fo:text-indent="-4.99mm" fo:margin-left="37.52m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0.02mm" fo:text-indent="-4.99mm" fo:margin-left="50.02m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2.53mm" fo:text-indent="-4.99mm" fo:margin-left="62.53m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5.04mm" fo:text-indent="-4.99mm" fo:margin-left="75.04m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7.54mm" fo:text-indent="-4.99mm" fo:margin-left="87.54m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0.05mm" fo:text-indent="-4.99mm" fo:margin-left="100.05m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2.55mm" fo:text-indent="-4.99mm" fo:margin-left="112.5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2.51mm" fo:text-indent="-4.99mm" fo:margin-left="12.51m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5.01mm" fo:text-indent="-4.99mm" fo:margin-left="25.01m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7.52mm" fo:text-indent="-4.99mm" fo:margin-left="37.52m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0.02mm" fo:text-indent="-4.99mm" fo:margin-left="50.02m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2.53mm" fo:text-indent="-4.99mm" fo:margin-left="62.53m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5.04mm" fo:text-indent="-4.99mm" fo:margin-left="75.04m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7.54mm" fo:text-indent="-4.99mm" fo:margin-left="87.54m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0.05mm" fo:text-indent="-4.99mm" fo:margin-left="100.05m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2.55mm" fo:text-indent="-4.99mm" fo:margin-left="112.5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2.51mm" fo:text-indent="-4.99mm" fo:margin-left="12.51m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25.01mm" fo:text-indent="-4.99mm" fo:margin-left="25.01m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37.52mm" fo:text-indent="-4.99mm" fo:margin-left="37.52m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50.02mm" fo:text-indent="-4.99mm" fo:margin-left="50.02m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62.53mm" fo:text-indent="-4.99mm" fo:margin-left="62.53m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75.04mm" fo:text-indent="-4.99mm" fo:margin-left="75.04m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87.54mm" fo:text-indent="-4.99mm" fo:margin-left="87.54m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100.05mm" fo:text-indent="-4.99mm" fo:margin-left="100.05m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112.55mm" fo:text-indent="-4.99mm" fo:margin-left="112.5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2.51mm" fo:text-indent="-4.99mm" fo:margin-left="12.51m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5.01mm" fo:text-indent="-4.99mm" fo:margin-left="25.01m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7.52mm" fo:text-indent="-4.99mm" fo:margin-left="37.52m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0.02mm" fo:text-indent="-4.99mm" fo:margin-left="50.02m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2.53mm" fo:text-indent="-4.99mm" fo:margin-left="62.53m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5.04mm" fo:text-indent="-4.99mm" fo:margin-left="75.04m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7.54mm" fo:text-indent="-4.99mm" fo:margin-left="87.54m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0.05mm" fo:text-indent="-4.99mm" fo:margin-left="100.05m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2.55mm" fo:text-indent="-4.99mm" fo:margin-left="112.5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2.51mm" fo:text-indent="-4.99mm" fo:margin-left="12.51m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25.01mm" fo:text-indent="-4.99mm" fo:margin-left="25.01m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37.52mm" fo:text-indent="-4.99mm" fo:margin-left="37.52m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50.02mm" fo:text-indent="-4.99mm" fo:margin-left="50.02m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62.53mm" fo:text-indent="-4.99mm" fo:margin-left="62.53m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75.04mm" fo:text-indent="-4.99mm" fo:margin-left="75.04m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87.54mm" fo:text-indent="-4.99mm" fo:margin-left="87.54m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100.05mm" fo:text-indent="-4.99mm" fo:margin-left="100.05m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112.55mm" fo:text-indent="-4.99mm" fo:margin-left="112.5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2.51mm" fo:text-indent="-4.99mm" fo:margin-left="12.51m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5.01mm" fo:text-indent="-4.99mm" fo:margin-left="25.01m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7.52mm" fo:text-indent="-4.99mm" fo:margin-left="37.52m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0.02mm" fo:text-indent="-4.99mm" fo:margin-left="50.02m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2.53mm" fo:text-indent="-4.99mm" fo:margin-left="62.53m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5.04mm" fo:text-indent="-4.99mm" fo:margin-left="75.04m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7.54mm" fo:text-indent="-4.99mm" fo:margin-left="87.54m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0.05mm" fo:text-indent="-4.99mm" fo:margin-left="100.05m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2.55mm" fo:text-indent="-4.99mm" fo:margin-left="112.5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2.51mm" fo:text-indent="-4.99mm" fo:margin-left="12.51m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25.01mm" fo:text-indent="-4.99mm" fo:margin-left="25.01m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37.52mm" fo:text-indent="-4.99mm" fo:margin-left="37.52m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50.02mm" fo:text-indent="-4.99mm" fo:margin-left="50.02m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62.53mm" fo:text-indent="-4.99mm" fo:margin-left="62.53m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75.04mm" fo:text-indent="-4.99mm" fo:margin-left="75.04m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87.54mm" fo:text-indent="-4.99mm" fo:margin-left="87.54m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100.05mm" fo:text-indent="-4.99mm" fo:margin-left="100.05m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112.55mm" fo:text-indent="-4.99mm" fo:margin-left="112.5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2.51mm" fo:text-indent="-4.99mm" fo:margin-left="12.51m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5.01mm" fo:text-indent="-4.99mm" fo:margin-left="25.01m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7.52mm" fo:text-indent="-4.99mm" fo:margin-left="37.52m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0.02mm" fo:text-indent="-4.99mm" fo:margin-left="50.02m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2.53mm" fo:text-indent="-4.99mm" fo:margin-left="62.53m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5.04mm" fo:text-indent="-4.99mm" fo:margin-left="75.04m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7.54mm" fo:text-indent="-4.99mm" fo:margin-left="87.54m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0.05mm" fo:text-indent="-4.99mm" fo:margin-left="100.05m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2.55mm" fo:text-indent="-4.99mm" fo:margin-left="112.5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4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6T18:30:27</meta:creation-date>
    <dc:language>bn-BD</dc:language>
    <dc:date>2026-05-26T22:06:07</dc:date>
    <meta:editing-cycles>24</meta:editing-cycles>
    <meta:editing-duration>PT1H15M</meta:editing-duration>
    <meta:generator>LibreOffice/26.2.4.2$Linux_X86_64 LibreOffice_project/620$Build-2</meta:generator>
    <meta:document-statistic meta:table-count="0" meta:image-count="0" meta:object-count="0" meta:page-count="4" meta:paragraph-count="77" meta:word-count="428" meta:character-count="2213" meta:non-whitespace-character-count="1862"/>
    <meta:user-defined meta:name="AppVersion">15.0000</meta:user-defined>
  </office:meta>
</office:document-meta>
</file>