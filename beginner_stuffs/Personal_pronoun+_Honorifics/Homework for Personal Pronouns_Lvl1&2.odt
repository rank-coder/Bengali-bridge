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ntium Book Plus" svg:font-family="'Gentium Book Plus'" style:font-family-generic="roman"/>
    <style:font-face style:name="July" svg:font-family="July" style:font-family-generic="roman"/>
    <style:font-face style:name="Liberation Serif" svg:font-family="'Liberation Serif'" style:font-family-generic="roman"/>
    <style:font-face style:name="Microsoft YaHei" svg:font-family="'Microsoft YaHei'" style:font-family-generic="roman"/>
    <style:font-face style:name="Mukti Narrow" svg:font-family="'Mukti Narrow'" style:font-family-generic="roman"/>
    <style:font-face style:name="NSimSun" svg:font-family="NSimSun" style:font-family-generic="roman"/>
    <style:font-face style:name="NSimSun1" svg:font-family="NSimSun" style:font-family-generic="swiss"/>
  </office:font-face-decls>
  <office:automatic-styles>
    <style:style style:name="P1" style:family="paragraph" style:parent-style-name="Heading_20_3">
      <style:paragraph-properties fo:margin-top="2.47mm" fo:margin-bottom="2.12mm" style:contextual-spacing="false" fo:text-align="left" style:justify-single-word="false" style:writing-mode="lr-tb"/>
    </style:style>
    <style:style style:name="P2" style:family="paragraph" style:parent-style-name="Text_20_body" style:list-style-name="WWNum2">
      <style:paragraph-properties fo:margin-left="0mm" fo:margin-right="0mm" fo:margin-top="0mm" fo:margin-bottom="1.41mm" style:contextual-spacing="false" fo:line-height="155%" fo:text-align="left" style:justify-single-word="false" fo:text-indent="-4.99mm" style:auto-text-indent="false" style:writing-mode="lr-tb">
        <style:tab-stops>
          <style:tab-stop style:position="0mm"/>
        </style:tab-stops>
      </style:paragraph-properties>
    </style:style>
    <style:style style:name="P3" style:family="paragraph" style:parent-style-name="Heading_20_3">
      <style:paragraph-properties fo:margin-left="0mm" fo:margin-right="0mm" fo:margin-top="7.76mm" fo:margin-bottom="3.88mm" style:contextual-spacing="false" fo:line-height="130%" fo:text-align="left" style:justify-single-word="false" fo:text-indent="0mm" style:auto-text-indent="false" style:writing-mode="lr-tb"/>
    </style:style>
    <style:style style:name="P4" style:family="paragraph" style:parent-style-name="Text_20_body" style:list-style-name="WWNum3">
      <style:paragraph-properties fo:margin-left="0mm" fo:margin-right="0mm" fo:margin-top="0mm" fo:margin-bottom="1.41mm" style:contextual-spacing="false" fo:line-height="155%" fo:text-align="left" style:justify-single-word="false" fo:text-indent="-4.99mm" style:auto-text-indent="false" style:writing-mode="lr-tb">
        <style:tab-stops>
          <style:tab-stop style:position="0mm"/>
        </style:tab-stops>
      </style:paragraph-properties>
    </style:style>
    <style:style style:name="P5" style:family="paragraph" style:parent-style-name="Text_20_body">
      <style:paragraph-properties fo:margin-left="0mm" fo:margin-right="0mm" fo:margin-top="0mm" fo:margin-bottom="4.23mm" style:contextual-spacing="false" fo:line-height="165%" fo:text-align="left" style:justify-single-word="false" fo:text-indent="0mm" style:auto-text-indent="false" style:writing-mode="lr-tb"/>
    </style:style>
    <style:style style:name="P6" style:family="paragraph" style:parent-style-name="Standard">
      <style:paragraph-properties fo:text-align="left" style:justify-single-word="false" style:writing-mode="lr-tb"/>
      <style:text-properties style:font-name="Gentium Book Plus" style:font-name-complex="Gentium Book Plus"/>
    </style:style>
    <style:style style:name="T1" style:family="text">
      <style:text-properties fo:color="#0f172a" loext:opacity="100%" style:font-name="Gentium Book Plus" fo:font-size="15pt" fo:font-weight="bold" style:font-size-asian="15pt" style:font-weight-asian="bold" style:font-name-complex="Gentium Book Plus"/>
    </style:style>
    <style:style style:name="T2" style:family="text">
      <style:text-properties style:font-name="Gentium Book Plus" fo:font-size="11pt" style:font-size-asian="11pt" style:font-name-complex="Gentium Book Plus"/>
    </style:style>
    <style:style style:name="T3" style:family="text">
      <style:text-properties style:font-name="Gentium Book Plus" style:font-name-complex="Gentium Book Plus" style:font-size-complex="11pt"/>
    </style:style>
    <style:style style:name="T4" style:family="text">
      <style:text-properties style:font-name="Gentium Book Plus" style:font-name-complex="Gentium Book Pl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Translate to Bangla (Use all possible honorific levels for both subjects and objects) (Optionally, use Bengali script)</text:span><text:span text:style-name="T1"/></text:h>
      <text:list text:style-name="WWNum2">
        <text:list-item>
          <text:p text:style-name="P2"><text:span text:style-name="T2">How are you?<text:line-break/>apni këmon ach</text:span><text:span text:style-name="Emphasis"><text:span text:style-name="T2">en</text:span></text:span><text:span text:style-name="T2">. (high honor)<text:line-break/>tumi këmon ach</text:span><text:span text:style-name="Emphasis"><text:span text:style-name="T2">o</text:span></text:span><text:span text:style-name="T2">. (normal)<text:line-break/>tui këmon ach</text:span><text:span text:style-name="Emphasis"><text:span text:style-name="T2">ish</text:span></text:span><text:span text:style-name="T2">. (low honor) </text:span></text:p>
        </text:list-item>
        <text:list-item>
          <text:p text:style-name="P2"><text:span text:style-name="T2">He is your (tomar/apnar) friend (bondhu).<text:line-break/></text:span><text:span text:style-name="Emphasis"><text:span text:style-name="T2">she</text:span></text:span><text:span text:style-name="T2"> tomar bondhu.<text:line-break/></text:span><text:span text:style-name="Emphasis"><text:span text:style-name="T2">tini</text:span></text:span><text:span text:style-name="T2"> tomar bondhu.<text:line-break/></text:span><text:span text:style-name="Emphasis"><text:span text:style-name="T2">tini</text:span></text:span><text:span text:style-name="T2"> </text:span><text:span text:style-name="Emphasis"><text:span text:style-name="T2">apnar</text:span></text:span><text:span text:style-name="T2"> bondhu. </text:span></text:p>
        </text:list-item>
        <text:list-item>
          <text:p text:style-name="P2"><text:span text:style-name="T2">How are you all?<text:line-break/></text:span><text:span text:style-name="Emphasis"><text:span text:style-name="T2">tomra</text:span></text:span><text:span text:style-name="T2"> këmon ach</text:span><text:span text:style-name="Emphasis"><text:span text:style-name="T2">o</text:span></text:span><text:span text:style-name="T2">. (normal)<text:line-break/></text:span><text:span text:style-name="Emphasis"><text:span text:style-name="T2">apnara</text:span></text:span><text:span text:style-name="T2"> këmon ach</text:span><text:span text:style-name="Emphasis"><text:span text:style-name="T2">en</text:span></text:span><text:span text:style-name="T2">. (high honor)<text:line-break/></text:span><text:span text:style-name="Emphasis"><text:span text:style-name="T2">tora</text:span></text:span><text:span text:style-name="T2"> këmon ach</text:span><text:span text:style-name="Emphasis"><text:span text:style-name="T2">ish</text:span></text:span><text:span text:style-name="T2">. (low honor) </text:span></text:p>
        </text:list-item>
        <text:list-item>
          <text:p text:style-name="P2"><text:span text:style-name="T2">I won't eat mango/mangoes.<text:line-break/></text:span><text:span text:style-name="Emphasis"><text:span text:style-name="T2">ami</text:span></text:span><text:span text:style-name="T2"> am kha</text:span><text:span text:style-name="Emphasis"><text:span text:style-name="T2">bo</text:span></text:span><text:span text:style-name="T2"> na. </text:span></text:p>
        </text:list-item>
        <text:list-item>
          <text:p text:style-name="P2"><text:span text:style-name="T2">We live (thaka) in Kolkata.<text:line-break/></text:span><text:span text:style-name="Emphasis"><text:span text:style-name="T2">amra</text:span></text:span><text:span text:style-name="T2"> kolkata thaki. (✔️) </text:span><text:span text:style-name="Emphasis"><text:span text:style-name="T2">amra</text:span></text:span><text:span text:style-name="T2"> kolkatay thaki. (✔️) </text:span><text:span text:style-name="Emphasis"><text:span text:style-name="T2">amra</text:span></text:span><text:span text:style-name="T2"> kolkatate thaki. (✔️) </text:span></text:p>
        </text:list-item>
        <text:list-item>
          <text:p text:style-name="P2"><text:span text:style-name="T2">I am Bangladeshi.<text:line-break/></text:span><text:span text:style-name="Emphasis"><text:span text:style-name="T2">ami</text:span></text:span><text:span text:style-name="T2"> baŋladeshi.<text:line-break/></text:span><text:span text:style-name="T3">আমি বাংলাদেশি। </text:span></text:p>
        </text:list-item>
        <text:list-item>
          <text:p text:style-name="P2"><text:span text:style-name="T2">Is your son (chele) here (ekhane)?<text:line-break/>ekhane ki </text:span><text:span text:style-name="Emphasis"><text:span text:style-name="T2">tomar</text:span></text:span><text:span text:style-name="T2"> chele ache? (✔️)<text:line-break/></text:span><text:span text:style-name="Emphasis"><text:span text:style-name="T2">apnar</text:span></text:span><text:span text:style-name="T2"> chele ekhane? (✔️)<text:line-break/></text:span><text:span text:style-name="Emphasis"><text:span text:style-name="T2">apnar</text:span></text:span><text:span text:style-name="T2"> chele ki ekhane? (✔️)<text:line-break/></text:span><text:span text:style-name="Emphasis"><text:span text:style-name="T2">tomar</text:span></text:span><text:span text:style-name="T2"> chele ki ekhane ache?<text:line-break/></text:span><text:soft-page-break/><text:span text:style-name="Emphasis"><text:span text:style-name="T2">tomar</text:span></text:span><text:span text:style-name="T2"> chele ekhane ache ki?<text:line-break/></text:span><text:span text:style-name="Emphasis"><text:span text:style-name="T2">tor</text:span></text:span><text:span text:style-name="T2"> chele ki ekhane ache? </text:span></text:p>
        </text:list-item>
        <text:list-item>
          <text:p text:style-name="P2"><text:span text:style-name="T2">Do you know (jana/para) Bengali?<text:line-break/></text:span><text:span text:style-name="Emphasis"><text:span text:style-name="T2">apni</text:span></text:span><text:span text:style-name="T2"> ki baŋla janen?<text:line-break/></text:span><text:span text:style-name="Emphasis"><text:span text:style-name="T2">tumi</text:span></text:span><text:span text:style-name="T2"> baŋla jano?<text:line-break/></text:span><text:span text:style-name="Emphasis"><text:span text:style-name="T2">tui</text:span></text:span><text:span text:style-name="T2"> ki baŋla jan</text:span><text:span text:style-name="Emphasis"><text:span text:style-name="T2">ish</text:span></text:span><text:span text:style-name="T2">? </text:span></text:p>
        </text:list-item>
        <text:list-item>
          <text:p text:style-name="P2"><text:span text:style-name="T2">Where (kothay/koi) do you live?<text:line-break/></text:span><text:span text:style-name="Emphasis"><text:span text:style-name="T2">apni</text:span></text:span><text:span text:style-name="T2"> kothay thak</text:span><text:span text:style-name="Emphasis"><text:span text:style-name="T2">en</text:span></text:span><text:span text:style-name="T2">?<text:line-break/></text:span><text:span text:style-name="Emphasis"><text:span text:style-name="T2">tui</text:span></text:span><text:span text:style-name="T2"> kothay thak</text:span><text:span text:style-name="Emphasis"><text:span text:style-name="T2">ish</text:span></text:span><text:span text:style-name="T2">?<text:line-break/></text:span><text:span text:style-name="Emphasis"><text:span text:style-name="T2">tumi</text:span></text:span><text:span text:style-name="T2"> kothay thak</text:span><text:span text:style-name="Emphasis"><text:span text:style-name="T2">o</text:span></text:span><text:span text:style-name="T2">?<text:line-break/></text:span><text:span text:style-name="Emphasis"><text:span text:style-name="T2">apni</text:span></text:span><text:span text:style-name="T2"> koi thaken?<text:line-break/></text:span><text:span text:style-name="Emphasis"><text:span text:style-name="T2">tui</text:span></text:span><text:span text:style-name="T2"> koi thakish?<text:line-break/></text:span><text:span text:style-name="Emphasis"><text:span text:style-name="T2">tumi</text:span></text:span><text:span text:style-name="T2"> koi thako? </text:span></text:p>
        </text:list-item>
        <text:list-item>
          <text:p text:style-name="P2"><text:span text:style-name="T2">Are you Bengali/Bangalee?<text:line-break/></text:span><text:span text:style-name="Emphasis"><text:span text:style-name="T2">tumi</text:span></text:span><text:span text:style-name="T2"> ki baŋali?<text:line-break/></text:span><text:span text:style-name="Emphasis"><text:span text:style-name="T2">tui</text:span></text:span><text:span text:style-name="T2"> ki baŋali?<text:line-break/></text:span><text:span text:style-name="Emphasis"><text:span text:style-name="T2">apni</text:span></text:span><text:span text:style-name="T2"> ki baŋali?<text:line-break/></text:span><text:span text:style-name="Emphasis"><text:span text:style-name="T2">apni</text:span></text:span><text:span text:style-name="T2"> baŋali ki? </text:span></text:p>
        </text:list-item>
        <text:list-item>
          <text:p text:style-name="P2"><text:span text:style-name="T2">Do you speak (bölo) English? (</text:span><text:span text:style-name="Emphasis"><text:span text:style-name="T2">trick question</text:span></text:span><text:span text:style-name="T2">)<text:line-break/>para = </text:span><text:span text:style-name="Emphasis"><text:span text:style-name="T2">to be able to</text:span></text:span><text:span text:style-name="T2"><text:line-break/></text:span><text:span text:style-name="Emphasis"><text:span text:style-name="T2">tumi</text:span></text:span><text:span text:style-name="T2"> ki iŋreji paro?<text:line-break/></text:span><text:span text:style-name="Emphasis"><text:span text:style-name="T2">tumi</text:span></text:span><text:span text:style-name="T2"> ki iŋreji bolte paro? (Are you able to speak English?)<text:line-break/></text:span><text:span text:style-name="Emphasis"><text:span text:style-name="T2">tumi</text:span></text:span><text:span text:style-name="T2"> ki iŋreji jano? (Do you know English?)<text:line-break/>❌ tumi ki iŋreji bölo? ❌ </text:span></text:p>
        </text:list-item>
      </text:list>
      <text:h text:style-name="P3" text:outline-level="3" loext:marker-style-name="T1"><text:span text:style-name="T1">Translate to English and Optionally Write out in Bengali Script</text:span><text:span text:style-name="T1"/></text:h>
      <text:list text:style-name="WWNum3">
        <text:list-item>
          <text:p text:style-name="P4" loext:marker-style-name="T2"><text:span text:style-name="T2">apni kothay thaken. [[Where do you live?]] </text:span><text:span text:style-name="T2"/></text:p>
        </text:list-item>
        <text:list-item>
          <text:p text:style-name="P4" loext:marker-style-name="T2"><text:span text:style-name="T2">ami ëkṭa köla khabo.[[I will eat a banana.]] </text:span><text:span text:style-name="T2"/></text:p>
        </text:list-item>
        <text:list-item>
          <text:p text:style-name="P4" loext:marker-style-name="T2"><text:soft-page-break/><text:span text:style-name="T2">ami shöb (all) likhechi. [[I have written it all.]] </text:span><text:span text:style-name="T2"/></text:p>
        </text:list-item>
        <text:list-item>
          <text:p text:style-name="P4" loext:marker-style-name="T2"><text:span text:style-name="T2">amra khub bhalo achi. [[We are doing very well.]] </text:span><text:span text:style-name="T2"/></text:p>
        </text:list-item>
        <text:list-item>
          <text:p text:style-name="P4" loext:marker-style-name="T2"><text:span text:style-name="T2">era kara? [[Who are these people? (normal honor)]] </text:span><text:span text:style-name="T2"/></text:p>
        </text:list-item>
      </text:list>
      <text:p text:style-name="P5" loext:marker-style-name="T2"><text:span text:style-name="T2">ke = who?<text:line-break/>ke ke = who? (pl.)<text:line-break/>kara = who? (pl.)<text:line-break/>kara kara = who? (pl.)</text:span><text:span text:style-name="T2"/></text:p>
      <text:p text:style-name="P5" loext:marker-style-name="T2"><text:span text:style-name="T2">See also: [[Whiteboard for Personal Pronouns &amp; Honorifics]]</text:span><text:span text:style-name="T2"/></text:p>
      <text:p text:style-name="P6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ntium Book Plus" svg:font-family="'Gentium Book Plus'" style:font-family-generic="roman"/>
    <style:font-face style:name="July" svg:font-family="July" style:font-family-generic="roman"/>
    <style:font-face style:name="Liberation Serif" svg:font-family="'Liberation Serif'" style:font-family-generic="roman"/>
    <style:font-face style:name="Microsoft YaHei" svg:font-family="'Microsoft YaHei'" style:font-family-generic="roman"/>
    <style:font-face style:name="Mukti Narrow" svg:font-family="'Mukti Narrow'" style:font-family-generic="roman"/>
    <style:font-face style:name="NSimSun" svg:font-family="NSimSun" style:font-family-generic="roman"/>
    <style:font-face style:name="NSimSun1" svg:font-family="NSimSun" style:font-family-generic="swiss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Gentium Book Plus" fo:font-size="12pt" fo:language="en" fo:country="GB" style:letter-kerning="true" style:font-name-asian="NSimSun" style:font-size-asian="12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Gentium Book Plus" fo:font-size="12pt" fo:language="en" fo:country="GB" style:letter-kerning="true" style:font-name-asian="NSimSun" style:font-size-asian="12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Gentium Book Plus" fo:font-family="'Gentium Book Plus'" style:font-family-generic="roman" fo:font-size="12pt" fo:language="en" fo:country="GB" style:letter-kerning="true" style:font-name-asian="NSimSun" style:font-family-asian="NSimSun" style:font-family-generic-asian="roman" style:font-size-asian="12pt" style:language-asian="zh" style:country-asian="CN" style:font-name-complex="July" style:font-family-complex="July" style:font-family-generic-complex="roman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Gentium Book Plus" fo:font-family="'Gentium Book Plus'" style:font-family-generic="roman" fo:font-size="14pt" style:font-name-asian="Microsoft YaHei" style:font-family-asian="'Microsoft YaHei'" style:font-family-generic-asian="roman" style:font-size-asian="14pt" style:font-name-complex="July" style:font-family-complex="July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Gentium Book Plus" fo:font-family="'Gentium Book Plus'" style:font-family-generic="roman" style:font-name-complex="July" style:font-family-complex="July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Gentium Book Plus" fo:font-family="'Gentium Book Plus'" style:font-family-generic="roman" fo:font-size="12pt" fo:font-style="italic" style:font-size-asian="12pt" style:font-style-asian="italic" style:font-name-complex="July" style:font-family-complex="July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Plus" fo:font-family="'Gentium Book Plus'" style:font-family-generic="roman" style:font-name-complex="July" style:font-family-complex="July" style:font-family-generic-complex="roman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2.47mm" fo:margin-bottom="2.12mm" style:contextual-spacing="false"/>
      <style:text-properties style:font-name="Liberation Serif" fo:font-family="'Liberation Serif'" style:font-family-generic="roman" fo:font-size="14pt" fo:font-weight="bold" style:font-name-asian="NSimSun1" style:font-family-asian="NSimSun" style:font-family-generic-asian="swiss" style:font-size-asian="14pt" style:font-weight-asian="bold" style:font-name-complex="Mukti Narrow" style:font-family-complex="'Mukti Narrow'" style:font-family-generic-complex="roman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4.99m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4.99m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20:23:47</meta:creation-date>
    <dc:language>bn-BD</dc:language>
    <dc:date>2026-06-21T20:27:21</dc:date>
    <meta:editing-cycles>1</meta:editing-cycles>
    <meta:editing-duration>PT3M</meta:editing-duration>
    <meta:generator>LibreOffice/26.2.4.2$Linux_X86_64 LibreOffice_project/620$Build-2</meta:generator>
    <meta:document-statistic meta:table-count="0" meta:image-count="0" meta:object-count="0" meta:page-count="3" meta:paragraph-count="20" meta:word-count="323" meta:character-count="1819" meta:non-whitespace-character-count="1516"/>
    <meta:user-defined meta:name="AppVersion">15.0000</meta:user-defined>
  </office:meta>
</office:document-meta>
</file>