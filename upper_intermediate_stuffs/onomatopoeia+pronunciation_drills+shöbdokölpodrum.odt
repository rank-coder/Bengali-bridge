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B000001C33B5E1F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swiss" style:font-pitch="variable"/>
    <style:font-face style:name="Gentium Book Plus" svg:font-family="'Gentium Book Plus'" style:font-family-generic="roman" style:font-charset="x-symbol"/>
    <style:font-face style:name="Gentium Book Plus1" svg:font-family="'Gentium Book Plus'" style:font-family-generic="swiss" style:font-charset="x-symbol"/>
    <style:font-face style:name="Noto Serif Bengali" svg:font-family="'Noto Serif Bengali'" style:font-family-generic="swiss" style:font-pitch="variable"/>
    <style:font-face style:name="OpenSymbol" svg:font-family="OpenSymbol" style:font-charset="x-symbol"/>
    <style:font-face style:name="OpenSymbol1" svg:font-family="OpenSymbol" style:font-family-generic="roman" style:font-charset="x-symbol"/>
    <style:font-face style:name="OpenSymbol2" svg:font-family="OpenSymbol" style:font-family-generic="swiss" style:font-charset="x-symbol"/>
    <style:font-face style:name="Segoe UI" svg:font-family="'Segoe UI'" style:font-family-generic="roman"/>
    <style:font-face style:name="Segoe UI1" svg:font-family="'Segoe UI'" style:font-family-generic="swiss" style:font-pitch="variable"/>
    <style:font-face style:name="Symbol" svg:font-family="Symbol" style:font-family-generic="roman" style:font-charset="x-symbol"/>
  </office:font-face-decls>
  <office:automatic-styles>
    <style:style style:name="Table1" style:family="table">
      <style:table-properties style:width="170mm" style:rel-width="100%" fo:margin-left="-0.02mm" fo:margin-top="0mm" fo:margin-bottom="0mm" table:align="left" style:writing-mode="page"/>
    </style:style>
    <style:style style:name="Table1.A" style:family="table-column">
      <style:table-column-properties style:column-width="60.61mm" style:rel-column-width="23363*"/>
    </style:style>
    <style:style style:name="Table1.B" style:family="table-column">
      <style:table-column-properties style:column-width="51.79mm" style:rel-column-width="19962*"/>
    </style:style>
    <style:style style:name="Table1.C" style:family="table-column">
      <style:table-column-properties style:column-width="57.61mm" style:rel-column-width="22210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49mm" fo:border-left="1.25pt dotted #000000" fo:border-right="none" fo:border-top="1.25pt dotted #000000" fo:border-bottom="1.25pt dotted #000000"/>
    </style:style>
    <style:style style:name="Table1.C1" style:family="table-cell">
      <style:table-cell-properties fo:padding="0.49mm" fo:border="1.25pt dotted #000000"/>
    </style:style>
    <style:style style:name="Table1.A2" style:family="table-cell">
      <style:table-cell-properties fo:padding="0.49mm" fo:border-left="1.25pt dotted #000000" fo:border-right="none" fo:border-top="none" fo:border-bottom="1.25pt dotted #000000"/>
    </style:style>
    <style:style style:name="Table1.C2" style:family="table-cell">
      <style:table-cell-properties fo:padding="0.49mm" fo:border-left="1.25pt dotted #000000" fo:border-right="1.25pt dotted #000000" fo:border-top="none" fo:border-bottom="1.25pt dotted #000000"/>
    </style:style>
    <style:style style:name="P1" style:family="paragraph" style:parent-style-name="Title">
      <style:paragraph-properties fo:margin-top="4.23mm" fo:margin-bottom="2.12mm" style:contextual-spacing="false"/>
    </style:style>
    <style:style style:name="P2" style:family="paragraph" style:parent-style-name="Heading_20_4" style:list-style-name="WWNum1">
      <style:paragraph-properties fo:margin-left="0mm" fo:text-align="left" style:justify-single-word="false" fo:text-indent="0mm" style:auto-text-indent="false"/>
    </style:style>
    <style:style style:name="P3" style:family="paragraph" style:parent-style-name="Frame_20_Contents">
      <style:paragraph-properties fo:margin-left="0mm" fo:text-indent="0mm" style:auto-text-indent="false" style:punctuation-wrap="simple"/>
    </style:style>
    <style:style style:name="P4" style:family="paragraph">
      <loext:graphic-properties draw:fill="none"/>
      <style:paragraph-properties fo:text-align="left"/>
      <style:text-properties fo:color="#000000" loext:opacity="100%" fo:font-size="18pt"/>
    </style:style>
    <style:style style:name="P5" style:family="paragraph" style:parent-style-name="Heading_20_1" style:list-style-name="WWNum1">
      <style:paragraph-properties fo:margin-left="0mm" fo:text-indent="0mm" style:auto-text-indent="false"/>
    </style:style>
    <style:style style:name="P6" style:family="paragraph" style:parent-style-name="Text_20_body">
      <style:paragraph-properties fo:margin-top="0mm" fo:margin-bottom="2.47mm" style:contextual-spacing="false"/>
    </style:style>
    <style:style style:name="T1" style:family="text">
      <style:text-properties fo:font-family="Cambria" style:font-family-generic="roman" style:font-name-asian="Segoe UI" style:font-family-complex="'BCC Purno'" style:font-family-generic-complex="roman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a933" loext:opacity="100%" fo:font-size="12pt" fo:font-style="normal" style:font-size-asian="12pt" style:font-style-asian="normal" style:font-style-complex="normal"/>
    </style:style>
    <style:style style:name="T4" style:family="text">
      <style:text-properties fo:color="#00a933" loext:opacity="100%" fo:font-size="12pt" fo:font-style="italic" style:font-size-asian="12pt" style:font-style-asian="italic" style:font-style-complex="italic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729fcf" draw:secondary-fill-color="#729fcf" draw:gradient-step-count="0" draw:fill-hatch-solid="false" draw:opacity="100%" draw:fill-image-width="0mm" draw:fill-image-height="0mm" style:repeat="repeat" draw:fill-image-ref-point-x="0%" draw:fill-image-ref-point-y="0%" draw:fill-image-ref-point="center" draw:tile-repeat-offset="0% horizontal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mm" draw:fill="none" loext:fill-use-slide-background="false" draw:textarea-vertical-align="top" draw:auto-grow-height="false" fo:min-height="23.14mm" fo:min-width="91.49mm" fo:padding-top="0mm" fo:padding-bottom="0mm" fo:padding-left="0mm" fo:padding-right="0mm" fo:wrap-option="wrap" loext:decorative="false"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omatopoeia <text:span text:style-name="T1">╳ Pronunciation ╳ Recitation</text:span><text:line-break/><text:span text:style-name="T1">Advanced Pronunciation Drills</text:span> </text:p>
      <text:p text:style-name="Subtitle">Shöbdo-kölpo-drum</text:p>
      <text:list text:style-name="WWNum1">
        <text:list-item>
          <text:list>
            <text:list-item>
              <text:list>
                <text:list-item>
                  <text:list>
                    <text:list-item>
                      <text:h text:style-name="P2" text:outline-level="4" loext:marker-style-name="T2"><draw:custom-shape text:anchor-type="char" draw:z-index="1" draw:name="Text Frame 1" draw:style-name="gr1" draw:text-style-name="P4" svg:width="91.48mm" svg:height="23.13mm" svg:x="72.69mm" svg:y="28.56mm"><text:p text:style-name="P3"><text:span text:style-name="T3">On the left we can see a screenshot of a children's textbook, the poem <text:line-break/></text:span><text:span text:style-name="T4">Shöbdo-kölpo-drum</text:span><text:span text:style-name="T3"> can be seen in there.</text:span></text:p><text:p text:style-name="P3"><text:span text:style-name="T3">The same poem is written below as well.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57.73mm" svg:height="58.77mm" draw:z-index="0"><draw:image xlink:href="Pictures/10000000000001BB000001C33B5E1F16.png" xlink:type="simple" xlink:show="embed" xlink:actuate="onLoad" draw:mime-type="image/png"/></draw:frame></text:h>
                    </text:list-item>
                  </text:list>
                </text:list-item>
              </text:list>
            </text:list-item>
          </text:list>
        </text:list-item>
        <text:list-item>
          <text:h text:style-name="P5" text:outline-level="1">শব্দকল্পদ্রুম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ঠাস্ ঠাস্ দ্রুম্ দ্রাম্, শুনে লাগে খট্‌কা—</text:p>
          </table:table-cell>
          <table:table-cell table:style-name="Table1.A1" office:value-type="string">
            <text:p text:style-name="Table_20_Contents">ṭhash ṭhash drum dram, shune lage khöṭka –</text:p>
          </table:table-cell>
          <table:table-cell table:style-name="Table1.C1" office:value-type="string">
            <text:p text:style-name="Table_20_Contents">khöṭka = doubt, hitch</text:p>
            <text:p text:style-name="Table_20_Contents">laga = to seem</text:p>
          </table:table-cell>
        </table:table-row>
        <table:table-row table:style-name="Table1.1">
          <table:table-cell table:style-name="Table1.A2" office:value-type="string">
            <text:p text:style-name="Table_20_Contents">ফুল ফোটে? তাই বলো! আমি ভাবি পট্কা!</text:p>
          </table:table-cell>
          <table:table-cell table:style-name="Table1.A2" office:value-type="string">
            <text:p text:style-name="Table_20_Contents">phul phöṭe? tai bölo! ami bhabi pöṭka!</text:p>
          </table:table-cell>
          <table:table-cell table:style-name="Table1.C2" office:value-type="string">
            <text:p text:style-name="Table_20_Contents">phoṭa = to bloom, explode</text:p>
            <text:p text:style-name="Table_20_Contents">pöṭka = mini explosive</text:p>
          </table:table-cell>
        </table:table-row>
        <table:table-row table:style-name="Table1.1">
          <table:table-cell table:style-name="Table1.A2" office:value-type="string">
            <text:p text:style-name="Table_20_Contents">শাঁই শাঁই পন্পন্, ভয়ে কান বন্ধ—</text:p>
          </table:table-cell>
          <table:table-cell table:style-name="Table1.A2" office:value-type="string">
            <text:p text:style-name="Table_20_Contents">shãi shãi pönpön, bhöye kan böndho –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ওই বুঝি ছুটে যায় সে-ফুলের গন্ধ?</text:p>
          </table:table-cell>
          <table:table-cell table:style-name="Table1.A2" office:value-type="string">
            <text:p text:style-name="Table_20_Contents">oi bujhi chuṭe jay she-phuler göndho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হুড়মুড় ধুপ্ধাপ্— ও কী শুনি ভাই রে!</text:p>
          </table:table-cell>
          <table:table-cell table:style-name="Table1.A2" office:value-type="string">
            <text:p text:style-name="Table_20_Contents">huṛmuṛ dhupdhap – o ki shuni bhai re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দেখছ না হিম পড়ে— যেও নাকো বাইরে!</text:p>
          </table:table-cell>
          <table:table-cell table:style-name="Table1.A2" office:value-type="string">
            <text:p text:style-name="Table_20_Contents">dekhcho na him pöṛe – jeo nako baire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চুপ্ চুপ্ ঐ শোন্! ঝুপ্ঝাপ্ ঝ-পাস্!</text:p>
          </table:table-cell>
          <table:table-cell table:style-name="Table1.A2" office:value-type="string">
            <text:p text:style-name="Table_20_Contents">cup cup oi shon! jhupjhap jhö-pash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চাঁদ বুঝি ডুবে গেল?— গব্ গব্ গ-বাস্!</text:p>
          </table:table-cell>
          <table:table-cell table:style-name="Table1.A2" office:value-type="string">
            <text:p text:style-name="Table_20_Contents">cãd bujhi ḍube gëlo? göb göb gö-bash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খ্যাঁশ্ খ্যাঁশ্ ঘ্যাঁচ্ ঘ্যাঁচ্, রাত কাটে ঐ রে!</text:p>
          </table:table-cell>
          <table:table-cell table:style-name="Table1.A2" office:value-type="string">
            <text:p text:style-name="Table_20_Contents">khë̃sh khë̃sh ghë̃c ghë̃c, rat kaṭe oi re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দুড়্ দাড়্ চুরমার— ঘুম ভাঙে কই রে! </text:p>
          </table:table-cell>
          <table:table-cell table:style-name="Table1.A2" office:value-type="string">
            <text:p text:style-name="Table_20_Contents">duṛ daṛ curmar – ghum bhaŋe koi re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ঘর্ঘর ভন্‌ভন্‌ ঘোরে কত চিন্তা!</text:p>
          </table:table-cell>
          <table:table-cell table:style-name="Table1.A2" office:value-type="string">
            <text:p text:style-name="Table_20_Contents">ghörghör bhönbhön ghore <text:soft-page-break/>köto cinta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কত মন নাচে শোন্— ধেই ধেই ধিন্‌তা!</text:p>
          </table:table-cell>
          <table:table-cell table:style-name="Table1.A2" office:value-type="string">
            <text:p text:style-name="Table_20_Contents">koto mon nace shon - dhei dhei dhinta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ঠুংঠাং ঢংঢং কত ব্যথা বাজে রে—</text:p>
          </table:table-cell>
          <table:table-cell table:style-name="Table1.A2" office:value-type="string">
            <text:p text:style-name="Table_20_Contents">ṭhuŋṭhaŋ ḍhöŋḍhöŋ kot bëtha baje re -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ফট্ফট্ বুক ফাটে তাই মাঝে মাঝে রে!</text:p>
          </table:table-cell>
          <table:table-cell table:style-name="Table1.A2" office:value-type="string">
            <text:p text:style-name="Table_20_Contents">phöṭphöṭ buk phaṭe tai majhe majhe re!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হৈ হৈ মার‌্ মার‌্, "বাপ্ বাপ্" চীৎকার—</text:p>
          </table:table-cell>
          <table:table-cell table:style-name="Table1.A2" office:value-type="string">
            <text:p text:style-name="Table_20_Contents">hoi hoi mar mar "bap bap" citkar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মালকোঁচা মারে বুঝি? সরে পড়্ এইবার!</text:p>
          </table:table-cell>
          <table:table-cell table:style-name="Table1.A2" office:value-type="string">
            <text:p text:style-name="Table_20_Contents">malkõca mare bujhi? shore pöṛ eibar!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swiss" style:font-pitch="variable"/>
    <style:font-face style:name="Gentium Book Plus" svg:font-family="'Gentium Book Plus'" style:font-family-generic="roman" style:font-charset="x-symbol"/>
    <style:font-face style:name="Gentium Book Plus1" svg:font-family="'Gentium Book Plus'" style:font-family-generic="swiss" style:font-charset="x-symbol"/>
    <style:font-face style:name="Noto Serif Bengali" svg:font-family="'Noto Serif Bengali'" style:font-family-generic="swiss" style:font-pitch="variable"/>
    <style:font-face style:name="OpenSymbol" svg:font-family="OpenSymbol" style:font-charset="x-symbol"/>
    <style:font-face style:name="OpenSymbol1" svg:font-family="OpenSymbol" style:font-family-generic="roman" style:font-charset="x-symbol"/>
    <style:font-face style:name="OpenSymbol2" svg:font-family="OpenSymbol" style:font-family-generic="swiss" style:font-charset="x-symbol"/>
    <style:font-face style:name="Segoe UI" svg:font-family="'Segoe UI'" style:font-family-generic="roman"/>
    <style:font-face style:name="Segoe UI1" svg:font-family="'Segoe UI'" style:font-family-generic="swiss" style:font-pitch="variable"/>
    <style:font-face style:name="Symbol" svg:font-family="Symbol" style:font-family-generic="roman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mbria" fo:font-size="12pt" fo:language="en" fo:country="GB" style:letter-kerning="true" style:font-name-asian="Segoe UI" style:font-size-asian="12pt" style:language-asian="zh" style:country-asian="CN" style:font-name-complex="Noto Serif Bengali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Cambria" fo:font-size="12pt" fo:language="en" fo:country="GB" style:letter-kerning="true" style:font-name-asian="Segoe UI" style:font-size-asian="12pt" style:language-asian="zh" style:country-asian="CN" style:font-name-complex="Noto Serif Bengali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fo:font-size="12pt" fo:language="en" fo:country="GB" style:letter-kerning="true" style:font-size-asian="12pt" style:language-asian="zh" style:country-asian="CN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Cambria" fo:font-family="Cambria" style:font-family-generic="swiss" style:font-pitch="variable" fo:font-size="14pt" style:font-name-asian="Segoe UI1" style:font-family-asian="'Segoe UI'" style:font-family-generic-asian="swiss" style:font-pitch-asian="variable" style:font-size-asian="14pt" style:font-name-complex="Noto Serif Bengali" style:font-family-complex="'Noto Serif Bengali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swiss" style:font-pitch="variable" style:font-name-complex="Noto Serif Bengali" style:font-family-complex="'Noto Serif Bengali'" style:font-family-generic-complex="swiss" style:font-pitch-complex="variable" style:font-size-complex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mbria" fo:font-family="Cambria" style:font-family-generic="swiss" style:font-pitch="variable" fo:font-size="12pt" fo:font-style="italic" style:font-size-asian="12pt" style:font-style-asian="italic" style:font-name-complex="Noto Serif Bengali" style:font-family-complex="'Noto Serif Bengali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swiss" style:font-pitch="variable" style:font-name-complex="Noto Serif Bengali" style:font-family-complex="'Noto Serif Bengali'" style:font-family-generic-complex="swiss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/>
      <style:text-properties fo:font-size="18pt" fo:font-style="normal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fo:color="#bf0041" loext:opacity="100%" fo:font-size="16pt" fo:font-style="normal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2.47mm" fo:margin-bottom="2.12mm" style:contextual-spacing="false"/>
      <style:text-properties fo:color="#800080" loext:opacity="100%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2.12mm" fo:margin-bottom="2.12mm" style:contextual-spacing="false"/>
      <style:text-properties fo:color="#00a933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style="normal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fo:font-weight="normal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Bullets" style:family="text">
      <style:text-properties style:font-name="OpenSymbol2" fo:font-family="OpenSymbol" style:font-family-generic="swiss" style:font-charset="x-symbol" style:font-name-asian="OpenSymbol" style:font-family-asian="OpenSymbol" style:font-charset-asian="x-symbol" style:font-name-complex="OpenSymbol1" style:font-family-complex="OpenSymbol" style:font-family-generic-complex="roman" style:font-charset-complex="x-symbol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11" style:display-name="ListLabel 11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2" style:display-name="ListLabel 12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3" style:display-name="ListLabel 13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14" style:display-name="ListLabel 14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5" style:display-name="ListLabel 15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6" style:display-name="ListLabel 16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17" style:display-name="ListLabel 17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8" style:display-name="ListLabel 18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7" style:display-name="ListLabel 27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6" style:display-name="ListLabel 26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5" style:display-name="ListLabel 25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24" style:display-name="ListLabel 24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3" style:display-name="ListLabel 23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2" style:display-name="ListLabel 22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ListLabel_20_21" style:display-name="ListLabel 21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20" style:display-name="ListLabel 20" style:family="text">
      <style:text-properties style:font-name="Gentium Book Plus1" fo:font-family="'Gentium Book Plus'" style:font-family-generic="swiss" style:font-charset="x-symbol" style:font-name-complex="OpenSymbol1" style:font-family-complex="OpenSymbol" style:font-family-generic-complex="roman" style:font-charset-complex="x-symbol"/>
    </style:style>
    <style:style style:name="ListLabel_20_19" style:display-name="ListLabel 19" style:family="text">
      <style:text-properties style:font-name="Gentium Book Plus" fo:font-family="'Gentium Book Plus'" style:font-family-generic="roman" style:font-charset="x-symbol" style:font-name-complex="Symbol" style:font-family-complex="Symbol" style:font-family-generic-complex="roman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4T21:12:18</meta:creation-date>
    <dc:language>bn-BD</dc:language>
    <dc:date>2026-07-16T09:02:11.823868008</dc:date>
    <meta:editing-cycles>10</meta:editing-cycles>
    <dc:title>Bengali Bridge Docs</dc:title>
    <meta:editing-duration>PT38M47S</meta:editing-duration>
    <meta:generator>LibreOffice/26.2.4.2$Linux_X86_64 LibreOffice_project/620$Build-2</meta:generator>
    <meta:document-statistic meta:table-count="1" meta:image-count="1" meta:object-count="0" meta:page-count="2" meta:paragraph-count="42" meta:word-count="269" meta:character-count="1266" meta:non-whitespace-character-count="1030"/>
    <meta:user-defined meta:name="AppVersion">15.0000</meta:user-defined>
    <meta:template xlink:type="simple" xlink:actuate="onRequest" xlink:title="Bengali Bridge Docs" xlink:href="" meta:date="2026-07-15T19:45:59.265325635"/>
  </office:meta>
</office:document-meta>
</file>